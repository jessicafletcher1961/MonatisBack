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15af" officeooo:paragraph-rsid="001615af"/>
    </style:style>
    <style:style style:name="P2" style:family="paragraph" style:parent-style-name="Heading_20_2" style:list-style-name=""/>
    <style:style style:name="P3" style:family="paragraph" style:parent-style-name="Standard">
      <style:paragraph-properties fo:margin-left="1.251cm" fo:text-indent="0cm" style:auto-text-indent="false"/>
    </style:style>
    <style:style style:name="P4" style:family="paragraph" style:parent-style-name="Standard">
      <style:paragraph-properties fo:margin-left="0cm" fo:text-indent="0cm" style:auto-text-indent="false"/>
    </style:style>
    <style:style style:name="P5" style:family="paragraph" style:parent-style-name="Standard">
      <style:paragraph-properties fo:margin-left="0cm" fo:text-indent="0cm" style:auto-text-indent="false"/>
      <style:text-properties style:font-name="Consolas" fo:font-size="10pt" officeooo:rsid="01552e56" officeooo:paragraph-rsid="01552e56" style:font-size-asian="10pt" style:font-size-complex="10pt"/>
    </style:style>
    <style:style style:name="P6" style:family="paragraph" style:parent-style-name="Standard">
      <style:text-properties fo:color="#2a00ff" loext:opacity="100%" style:font-name="Consolas" fo:font-size="10pt" style:font-size-asian="10pt" style:font-size-complex="10pt"/>
    </style:style>
    <style:style style:name="P7" style:family="paragraph" style:parent-style-name="Standard">
      <style:text-properties fo:color="#2a00ff" loext:opacity="100%" style:font-name="Consolas" fo:font-size="10pt" officeooo:paragraph-rsid="014e5dc6" style:font-size-asian="10pt" style:font-size-complex="10pt"/>
    </style:style>
    <style:style style:name="P8" style:family="paragraph" style:parent-style-name="Standard">
      <style:text-properties fo:color="#2a00ff" loext:opacity="100%" style:font-name="Consolas" fo:font-size="10pt" officeooo:paragraph-rsid="014e9ef0" style:font-size-asian="10pt" style:font-size-complex="10pt"/>
    </style:style>
    <style:style style:name="P9" style:family="paragraph" style:parent-style-name="Standard">
      <style:text-properties fo:color="#2a00ff" loext:opacity="100%" style:font-name="Consolas" fo:font-size="10pt" officeooo:paragraph-rsid="015241cf" style:font-size-asian="10pt" style:font-size-complex="10pt"/>
    </style:style>
    <style:style style:name="P10" style:family="paragraph" style:parent-style-name="Standard">
      <style:text-properties fo:color="#2a00ff" loext:opacity="100%" style:font-name="Consolas" fo:font-size="10pt" officeooo:rsid="015438b7" officeooo:paragraph-rsid="01552774" style:font-size-asian="10pt" style:font-size-complex="10pt"/>
    </style:style>
    <style:style style:name="P11" style:family="paragraph" style:parent-style-name="Standard">
      <style:paragraph-properties fo:margin-left="0cm" fo:text-indent="0cm" style:auto-text-indent="false"/>
      <style:text-properties officeooo:paragraph-rsid="0156cd57"/>
    </style:style>
    <style:style style:name="P12" style:family="paragraph" style:parent-style-name="Standard">
      <style:text-properties fo:color="#2a00ff" loext:opacity="100%" style:font-name="Consolas" fo:font-size="10pt" officeooo:paragraph-rsid="0156cd57" style:font-size-asian="10pt" style:font-size-complex="10pt"/>
    </style:style>
    <style:style style:name="P13" style:family="paragraph" style:parent-style-name="Standard">
      <style:text-properties fo:color="#2a00ff" loext:opacity="100%" style:font-name="Consolas" fo:font-size="10pt" officeooo:rsid="015438b7" officeooo:paragraph-rsid="0156cd57" style:font-size-asian="10pt" style:font-size-complex="10pt"/>
    </style:style>
    <style:style style:name="P14" style:family="paragraph" style:parent-style-name="Text_20_body">
      <style:text-properties officeooo:rsid="00162296" officeooo:paragraph-rsid="00162296"/>
    </style:style>
    <style:style style:name="P15" style:family="paragraph" style:parent-style-name="Standard">
      <style:paragraph-properties fo:margin-left="0cm" fo:text-indent="0cm" style:auto-text-indent="false"/>
      <style:text-properties officeooo:paragraph-rsid="015a2847"/>
    </style:style>
    <style:style style:name="P16" style:family="paragraph" style:parent-style-name="Standard">
      <style:text-properties fo:color="#2a00ff" loext:opacity="100%" style:font-name="Consolas" fo:font-size="10pt" officeooo:paragraph-rsid="015a2847" style:font-size-asian="10pt" style:font-size-complex="10pt"/>
    </style:style>
    <style:style style:name="P17" style:family="paragraph" style:parent-style-name="Standard">
      <style:text-properties fo:color="#2a00ff" loext:opacity="100%" style:font-name="Consolas" fo:font-size="10pt" officeooo:paragraph-rsid="015b08b9" style:font-size-asian="10pt" style:font-size-complex="10pt"/>
    </style:style>
    <style:style style:name="P18" style:family="paragraph" style:parent-style-name="Standard">
      <style:text-properties fo:color="#2a00ff" loext:opacity="100%" style:font-name="Consolas" fo:font-size="10pt" officeooo:rsid="015438b7" officeooo:paragraph-rsid="015b08b9" style:font-size-asian="10pt" style:font-size-complex="10pt"/>
    </style:style>
    <style:style style:name="P19" style:family="paragraph" style:parent-style-name="Text_20_body">
      <style:text-properties officeooo:rsid="00162296" officeooo:paragraph-rsid="015a2847"/>
    </style:style>
    <style:style style:name="P20" style:family="paragraph" style:parent-style-name="Standard">
      <style:paragraph-properties fo:margin-left="2.501cm" fo:text-indent="0cm" style:auto-text-indent="false"/>
    </style:style>
    <style:style style:name="P21" style:family="paragraph" style:parent-style-name="Text_20_body">
      <style:paragraph-properties fo:margin-left="1.251cm" fo:text-indent="0cm" style:auto-text-indent="false"/>
      <style:text-properties officeooo:rsid="00180e10" officeooo:paragraph-rsid="00180e10"/>
    </style:style>
    <style:style style:name="P22" style:family="paragraph" style:parent-style-name="Standard">
      <style:text-properties officeooo:paragraph-rsid="015ff8b4"/>
    </style:style>
    <style:style style:name="P23" style:family="paragraph" style:parent-style-name="Standard">
      <style:paragraph-properties fo:margin-left="0cm" fo:text-indent="0cm" style:auto-text-indent="false"/>
      <style:text-properties officeooo:paragraph-rsid="015ff8b4"/>
    </style:style>
    <style:style style:name="P24" style:family="paragraph" style:parent-style-name="Standard">
      <style:text-properties fo:color="#2a00ff" loext:opacity="100%" style:font-name="Consolas" fo:font-size="10pt" officeooo:paragraph-rsid="015ff8b4" style:font-size-asian="10pt" style:font-size-complex="10pt"/>
    </style:style>
    <style:style style:name="P25" style:family="paragraph" style:parent-style-name="Standard">
      <style:text-properties fo:color="#2a00ff" loext:opacity="100%" style:font-name="Consolas" fo:font-size="10pt" officeooo:paragraph-rsid="01622594" style:font-size-asian="10pt" style:font-size-complex="10pt"/>
    </style:style>
    <style:style style:name="P26" style:family="paragraph" style:parent-style-name="Standard">
      <style:text-properties fo:color="#2a00ff" loext:opacity="100%" style:font-name="Consolas" fo:font-size="10pt" officeooo:rsid="015438b7" officeooo:paragraph-rsid="01622594" style:font-size-asian="10pt" style:font-size-complex="10pt"/>
    </style:style>
    <style:style style:name="P27" style:family="paragraph" style:parent-style-name="Standard">
      <style:text-properties fo:color="#2a00ff" loext:opacity="100%" style:font-name="Consolas" fo:font-size="10pt" fo:font-style="italic" officeooo:rsid="0162e104" officeooo:paragraph-rsid="0162e104" style:font-size-asian="10pt" style:font-style-asian="italic" style:font-size-complex="10pt" style:font-style-complex="italic"/>
    </style:style>
    <style:style style:name="P28" style:family="paragraph" style:parent-style-name="Text_20_body">
      <style:text-properties officeooo:rsid="00162296" officeooo:paragraph-rsid="015ff8b4"/>
    </style:style>
    <style:style style:name="P29" style:family="paragraph" style:parent-style-name="Standard">
      <style:text-properties officeooo:paragraph-rsid="01645bd3"/>
    </style:style>
    <style:style style:name="P30" style:family="paragraph" style:parent-style-name="Standard">
      <style:paragraph-properties fo:margin-left="0cm" fo:text-indent="0cm" style:auto-text-indent="false"/>
      <style:text-properties officeooo:paragraph-rsid="01645bd3"/>
    </style:style>
    <style:style style:name="P31" style:family="paragraph" style:parent-style-name="Standard">
      <style:text-properties fo:color="#2a00ff" loext:opacity="100%" style:font-name="Consolas" fo:font-size="10pt" officeooo:paragraph-rsid="01694789" style:font-size-asian="10pt" style:font-size-complex="10pt"/>
    </style:style>
    <style:style style:name="P32" style:family="paragraph" style:parent-style-name="Standard">
      <style:text-properties fo:color="#2a00ff" loext:opacity="100%" style:font-name="Consolas" fo:font-size="10pt" officeooo:rsid="015438b7" officeooo:paragraph-rsid="01694789" style:font-size-asian="10pt" style:font-size-complex="10pt"/>
    </style:style>
    <style:style style:name="P33" style:family="paragraph" style:parent-style-name="Standard">
      <style:text-properties fo:color="#2a00ff" loext:opacity="100%" style:font-name="Consolas" fo:font-size="10pt" officeooo:rsid="015438b7" officeooo:paragraph-rsid="01645bd3" style:font-size-asian="10pt" style:font-size-complex="10pt"/>
    </style:style>
    <style:style style:name="P34" style:family="paragraph" style:parent-style-name="Standard">
      <style:text-properties fo:color="#2a00ff" loext:opacity="100%" style:font-name="Consolas" fo:font-size="10pt" fo:font-style="italic" officeooo:rsid="0162e104" officeooo:paragraph-rsid="01645bd3" style:font-size-asian="10pt" style:font-style-asian="italic" style:font-size-complex="10pt" style:font-style-complex="italic"/>
    </style:style>
    <style:style style:name="P35" style:family="paragraph" style:parent-style-name="Standard">
      <style:paragraph-properties fo:margin-left="1.251cm" fo:text-indent="0cm" style:auto-text-indent="false"/>
      <style:text-properties officeooo:paragraph-rsid="00bf9c04"/>
    </style:style>
    <style:style style:name="P36" style:family="paragraph" style:parent-style-name="Standard">
      <style:paragraph-properties fo:margin-left="0cm" fo:text-indent="0cm" style:auto-text-indent="false"/>
      <style:text-properties officeooo:paragraph-rsid="016a568c"/>
    </style:style>
    <style:style style:name="P37" style:family="paragraph" style:parent-style-name="Standard">
      <style:text-properties officeooo:paragraph-rsid="016a568c"/>
    </style:style>
    <style:style style:name="P38" style:family="paragraph" style:parent-style-name="Standard">
      <style:text-properties fo:color="#2a00ff" loext:opacity="100%" style:font-name="Consolas" fo:font-size="10pt" officeooo:paragraph-rsid="016ddb2f" style:font-size-asian="10pt" style:font-size-complex="10pt"/>
    </style:style>
    <style:style style:name="P39" style:family="paragraph" style:parent-style-name="Standard">
      <style:text-properties fo:color="#2a00ff" loext:opacity="100%" style:font-name="Consolas" fo:font-size="10pt" officeooo:paragraph-rsid="016f6afc" style:font-size-asian="10pt" style:font-size-complex="10pt"/>
    </style:style>
    <style:style style:name="P40" style:family="paragraph" style:parent-style-name="Standard">
      <style:text-properties fo:color="#2a00ff" loext:opacity="100%" style:font-name="Consolas" fo:font-size="10pt" officeooo:rsid="015438b7" officeooo:paragraph-rsid="016f6afc" style:font-size-asian="10pt" style:font-size-complex="10pt"/>
    </style:style>
    <style:style style:name="P41" style:family="paragraph" style:parent-style-name="Standard">
      <style:text-properties fo:color="#2a00ff" loext:opacity="100%" style:font-name="Consolas" fo:font-size="10pt" fo:font-style="italic" officeooo:rsid="0162e104" officeooo:paragraph-rsid="016a568c" style:font-size-asian="10pt" style:font-style-asian="italic" style:font-size-complex="10pt" style:font-style-complex="italic"/>
    </style:style>
    <style:style style:name="P42" style:family="paragraph" style:parent-style-name="Text_20_body">
      <style:text-properties officeooo:rsid="00162296" officeooo:paragraph-rsid="016a568c"/>
    </style:style>
    <style:style style:name="P43" style:family="paragraph" style:parent-style-name="Standard">
      <style:text-properties officeooo:rsid="0026c3f3" officeooo:paragraph-rsid="002b9804"/>
    </style:style>
    <style:style style:name="P44" style:family="paragraph" style:parent-style-name="Standard">
      <style:text-properties officeooo:paragraph-rsid="002cd200"/>
    </style:style>
    <style:style style:name="P45" style:family="paragraph" style:parent-style-name="Standard">
      <style:paragraph-properties fo:margin-left="1.251cm" fo:text-indent="0cm" style:auto-text-indent="false"/>
      <style:text-properties officeooo:paragraph-rsid="003286a6"/>
    </style:style>
    <style:style style:name="P46" style:family="paragraph" style:parent-style-name="Standard" style:list-style-name="L1">
      <style:text-properties officeooo:paragraph-rsid="003286a6"/>
    </style:style>
    <style:style style:name="P47" style:family="paragraph" style:parent-style-name="Standard" style:list-style-name="L1">
      <style:text-properties officeooo:paragraph-rsid="00378b8c"/>
    </style:style>
    <style:style style:name="P48" style:family="paragraph" style:parent-style-name="Standard" style:list-style-name="L1">
      <style:text-properties officeooo:paragraph-rsid="00383e86"/>
    </style:style>
    <style:style style:name="P49" style:family="paragraph" style:parent-style-name="Standard" style:list-style-name="L1">
      <style:text-properties officeooo:rsid="003b1a53" officeooo:paragraph-rsid="003b1a53"/>
    </style:style>
    <style:style style:name="P50" style:family="paragraph" style:parent-style-name="Standard">
      <style:paragraph-properties fo:margin-left="1.251cm" fo:text-indent="0cm" style:auto-text-indent="false"/>
      <style:text-properties officeooo:paragraph-rsid="002cd200"/>
    </style:style>
    <style:style style:name="P51" style:family="paragraph" style:parent-style-name="Text_20_body">
      <style:paragraph-properties fo:margin-left="1.251cm" fo:text-indent="0cm" style:auto-text-indent="false"/>
      <style:text-properties officeooo:rsid="00180e10" officeooo:paragraph-rsid="0046c5d0"/>
    </style:style>
    <style:style style:name="P52" style:family="paragraph" style:parent-style-name="Standard" style:list-style-name="L2">
      <style:paragraph-properties fo:margin-left="6.253cm" fo:text-indent="-0.635cm" style:auto-text-indent="false"/>
      <style:text-properties officeooo:rsid="01e2f34f" officeooo:paragraph-rsid="01e2f34f"/>
    </style:style>
    <style:style style:name="P53" style:family="paragraph" style:parent-style-name="Standard" style:list-style-name="L2">
      <style:paragraph-properties fo:margin-left="6.253cm" fo:text-indent="-0.635cm" style:auto-text-indent="false"/>
    </style:style>
    <style:style style:name="P54" style:family="paragraph" style:parent-style-name="Standard">
      <style:paragraph-properties fo:margin-left="2.501cm" fo:text-indent="0cm" style:auto-text-indent="false"/>
      <style:text-properties style:text-underline-style="solid" style:text-underline-width="auto" style:text-underline-color="font-color"/>
    </style:style>
    <style:style style:name="P55" style:family="paragraph" style:parent-style-name="Standard">
      <style:paragraph-properties fo:margin-left="1.251cm" fo:text-indent="0cm" style:auto-text-indent="false"/>
      <style:text-properties style:text-underline-style="solid" style:text-underline-width="auto" style:text-underline-color="font-color" officeooo:paragraph-rsid="002cd200"/>
    </style:style>
    <style:style style:name="P56" style:family="paragraph" style:parent-style-name="Standard">
      <style:text-properties officeooo:rsid="001615af" officeooo:paragraph-rsid="002cd200"/>
    </style:style>
    <style:style style:name="P57" style:family="paragraph" style:parent-style-name="Standard">
      <style:paragraph-properties fo:margin-left="0cm" fo:text-indent="0cm" style:auto-text-indent="false"/>
      <style:text-properties officeooo:paragraph-rsid="017306e0"/>
    </style:style>
    <style:style style:name="P58" style:family="paragraph" style:parent-style-name="Standard">
      <style:text-properties officeooo:paragraph-rsid="017306e0"/>
    </style:style>
    <style:style style:name="P59" style:family="paragraph" style:parent-style-name="Standard">
      <style:text-properties fo:color="#2a00ff" loext:opacity="100%" style:font-name="Consolas" fo:font-size="10pt" officeooo:paragraph-rsid="017306e0" style:font-size-asian="10pt" style:font-size-complex="10pt"/>
    </style:style>
    <style:style style:name="P60" style:family="paragraph" style:parent-style-name="Standard">
      <style:text-properties fo:color="#2a00ff" loext:opacity="100%" style:font-name="Consolas" fo:font-size="10pt" officeooo:rsid="015438b7" officeooo:paragraph-rsid="017306e0" style:font-size-asian="10pt" style:font-size-complex="10pt"/>
    </style:style>
    <style:style style:name="P61" style:family="paragraph" style:parent-style-name="Standard">
      <style:text-properties officeooo:rsid="01776212" officeooo:paragraph-rsid="01976995"/>
    </style:style>
    <style:style style:name="P62" style:family="paragraph" style:parent-style-name="Standard">
      <style:text-properties fo:color="#2a00ff" loext:opacity="100%" style:font-name="Consolas" fo:font-size="10pt" fo:font-style="italic" officeooo:rsid="019622e9" officeooo:paragraph-rsid="01976995" style:font-size-asian="10pt" style:font-style-asian="italic" style:font-size-complex="10pt" style:font-style-complex="italic"/>
    </style:style>
    <style:style style:name="P63" style:family="paragraph" style:parent-style-name="Standard">
      <style:text-properties fo:color="#2a00ff" loext:opacity="100%" style:font-name="Consolas" fo:font-size="10pt" officeooo:rsid="01920ea7" officeooo:paragraph-rsid="01afe2f7" style:font-size-asian="10pt" style:font-size-complex="10pt"/>
    </style:style>
    <style:style style:name="P64" style:family="paragraph" style:parent-style-name="Standard">
      <style:text-properties fo:color="#2a00ff" loext:opacity="100%" style:font-name="Consolas" fo:font-size="10pt" fo:font-style="italic" officeooo:rsid="0194930d" officeooo:paragraph-rsid="01afe2f7" style:font-size-asian="10pt" style:font-style-asian="italic" style:font-size-complex="10pt" style:font-style-complex="italic"/>
    </style:style>
    <style:style style:name="P65" style:family="paragraph" style:parent-style-name="Standard">
      <style:text-properties officeooo:rsid="01776212" officeooo:paragraph-rsid="01afe2f7"/>
    </style:style>
    <style:style style:name="P66" style:family="paragraph" style:parent-style-name="Standard">
      <style:paragraph-properties fo:margin-left="0cm" fo:text-indent="0cm" style:auto-text-indent="false"/>
      <style:text-properties officeooo:paragraph-rsid="019b9b46"/>
    </style:style>
    <style:style style:name="P67" style:family="paragraph" style:parent-style-name="Standard">
      <style:text-properties officeooo:paragraph-rsid="019b9b46"/>
    </style:style>
    <style:style style:name="P68" style:family="paragraph" style:parent-style-name="Standard">
      <style:text-properties fo:color="#2a00ff" loext:opacity="100%" style:font-name="Consolas" fo:font-size="10pt" officeooo:paragraph-rsid="01b429bf" style:font-size-asian="10pt" style:font-size-complex="10pt"/>
    </style:style>
    <style:style style:name="P69" style:family="paragraph" style:parent-style-name="Standard">
      <style:text-properties fo:color="#2a00ff" loext:opacity="100%" style:font-name="Consolas" fo:font-size="10pt" officeooo:rsid="015438b7" officeooo:paragraph-rsid="01b429bf" style:font-size-asian="10pt" style:font-size-complex="10pt"/>
    </style:style>
    <style:style style:name="P70" style:family="paragraph" style:parent-style-name="Standard">
      <style:text-properties officeooo:rsid="01776212" officeooo:paragraph-rsid="019b9b46"/>
    </style:style>
    <style:style style:name="P71" style:family="paragraph" style:parent-style-name="Standard">
      <style:text-properties fo:font-weight="bold" officeooo:rsid="0351ffa1" officeooo:paragraph-rsid="0351ffa1" style:font-weight-asian="bold" style:font-weight-complex="bold"/>
    </style:style>
    <style:style style:name="P72" style:family="paragraph" style:parent-style-name="Standard">
      <style:text-properties officeooo:paragraph-rsid="0350910e"/>
    </style:style>
    <style:style style:name="P73" style:family="paragraph" style:parent-style-name="Standard">
      <style:text-properties fo:color="#2a00ff" loext:opacity="100%" style:font-name="Consolas" fo:font-size="10pt" officeooo:rsid="01920ea7" officeooo:paragraph-rsid="01b034b6" style:font-size-asian="10pt" style:font-size-complex="10pt"/>
    </style:style>
    <style:style style:name="P74" style:family="paragraph" style:parent-style-name="Standard">
      <style:text-properties officeooo:paragraph-rsid="0351ffa1"/>
    </style:style>
    <style:style style:name="P75" style:family="paragraph" style:parent-style-name="Standard">
      <style:text-properties fo:color="#000000" loext:opacity="100%" style:font-name="Consolas1" fo:font-size="10pt" officeooo:rsid="0324dd97" officeooo:paragraph-rsid="0351ffa1" fo:background-color="#e8f2fe" style:font-size-asian="10pt"/>
    </style:style>
    <style:style style:name="P76" style:family="paragraph" style:parent-style-name="Standard">
      <style:paragraph-properties fo:text-align="left" style:justify-single-word="false" fo:text-indent="0cm" style:auto-text-indent="false"/>
      <style:text-properties officeooo:paragraph-rsid="0351ffa1"/>
    </style:style>
    <style:style style:name="P77" style:family="paragraph" style:parent-style-name="Standard">
      <style:paragraph-properties fo:text-align="left" style:justify-single-word="false" fo:text-indent="0cm" style:auto-text-indent="false"/>
      <style:text-properties fo:color="#000000" loext:opacity="100%" style:font-name="Consolas1" fo:font-size="10pt" officeooo:rsid="0324dd97" officeooo:paragraph-rsid="0351ffa1" fo:background-color="#e8f2fe" style:font-size-asian="10pt"/>
    </style:style>
    <style:style style:name="P78" style:family="paragraph" style:parent-style-name="Standard">
      <style:text-properties fo:color="#2a00ff" loext:opacity="100%" style:font-name="Consolas" fo:font-size="10pt" officeooo:rsid="01776212" officeooo:paragraph-rsid="0351ffa1" style:font-size-asian="10pt" style:font-size-complex="10pt"/>
    </style:style>
    <style:style style:name="P79" style:family="paragraph" style:parent-style-name="Standard">
      <style:paragraph-properties fo:break-before="page"/>
      <style:text-properties fo:color="#2a00ff" loext:opacity="100%" style:font-name="Consolas" fo:font-size="10pt" officeooo:rsid="01776212" officeooo:paragraph-rsid="0351ffa1" style:font-size-asian="10pt" style:font-size-complex="10pt"/>
    </style:style>
    <style:style style:name="P80" style:family="paragraph" style:parent-style-name="Standard">
      <style:text-properties fo:color="#2a00ff" loext:opacity="100%" officeooo:rsid="01776212" officeooo:paragraph-rsid="024bed9a"/>
    </style:style>
    <style:style style:name="P81" style:family="paragraph" style:parent-style-name="Standard">
      <style:text-properties style:use-window-font-color="true" loext:opacity="0%" officeooo:paragraph-rsid="024bed9a"/>
    </style:style>
    <style:style style:name="P82" style:family="paragraph" style:parent-style-name="Standard">
      <style:text-properties officeooo:paragraph-rsid="024bed9a"/>
    </style:style>
    <style:style style:name="P83" style:family="paragraph" style:parent-style-name="Standard">
      <style:text-properties fo:color="#2a00ff" loext:opacity="100%" style:font-name="Consolas" fo:font-size="10pt" officeooo:paragraph-rsid="02f349c4" style:font-size-asian="10pt" style:font-size-complex="10pt"/>
    </style:style>
    <style:style style:name="P84" style:family="paragraph" style:parent-style-name="Standard">
      <style:text-properties officeooo:rsid="015438b7" officeooo:paragraph-rsid="02f349c4"/>
    </style:style>
    <style:style style:name="P85" style:family="paragraph" style:parent-style-name="Standard">
      <style:text-properties fo:color="#2a00ff" loext:opacity="100%" style:font-name="Consolas" fo:font-size="10pt" officeooo:rsid="01530af7" officeooo:paragraph-rsid="02f349c4" style:font-size-asian="10pt" style:font-size-complex="10pt"/>
    </style:style>
    <style:style style:name="P86" style:family="paragraph" style:parent-style-name="Heading_20_4" style:list-style-name="">
      <style:text-properties officeooo:paragraph-rsid="032c394e"/>
    </style:style>
    <style:style style:name="P87" style:family="paragraph" style:parent-style-name="Heading_20_5" style:list-style-name="">
      <style:paragraph-properties fo:text-align="left" style:justify-single-word="false"/>
    </style:style>
    <style:style style:name="P88" style:family="paragraph" style:parent-style-name="Standard">
      <style:text-properties officeooo:paragraph-rsid="03323497"/>
    </style:style>
    <style:style style:name="P89" style:family="paragraph" style:parent-style-name="Standard">
      <style:text-properties fo:color="#2a00ff" loext:opacity="100%" style:font-name="Consolas" fo:font-size="10pt" fo:font-style="italic" officeooo:paragraph-rsid="03323497" style:font-size-asian="10pt" style:font-style-asian="italic" style:font-size-complex="10pt" style:font-style-complex="italic"/>
    </style:style>
    <style:style style:name="P90" style:family="paragraph" style:parent-style-name="Standard">
      <style:text-properties officeooo:paragraph-rsid="0324dd97"/>
    </style:style>
    <style:style style:name="P91" style:family="paragraph" style:parent-style-name="Standard">
      <style:text-properties fo:color="#000000" loext:opacity="100%" style:font-name="Consolas1" fo:font-size="10pt" officeooo:rsid="0324dd97" officeooo:paragraph-rsid="0324dd97" fo:background-color="#e8f2fe" style:font-size-asian="10pt"/>
    </style:style>
    <style:style style:name="P92" style:family="paragraph" style:parent-style-name="Standard">
      <style:paragraph-properties fo:text-align="left" style:justify-single-word="false" fo:text-indent="0cm" style:auto-text-indent="false"/>
    </style:style>
    <style:style style:name="P93" style:family="paragraph" style:parent-style-name="Standard">
      <style:paragraph-properties fo:text-align="left" style:justify-single-word="false" fo:text-indent="0cm" style:auto-text-indent="false"/>
      <style:text-properties officeooo:paragraph-rsid="03302f20"/>
    </style:style>
    <style:style style:name="P94" style:family="paragraph" style:parent-style-name="Standard">
      <style:text-properties officeooo:rsid="033417ad" officeooo:paragraph-rsid="033417ad"/>
    </style:style>
    <style:style style:name="P95" style:family="paragraph" style:parent-style-name="Standard">
      <style:text-properties fo:color="#2a00ff" loext:opacity="100%" style:font-name="Consolas" fo:font-size="10pt" officeooo:rsid="01530af7" officeooo:paragraph-rsid="033417ad" style:font-size-asian="10pt" style:font-size-complex="10pt"/>
    </style:style>
    <style:style style:name="P96" style:family="paragraph" style:parent-style-name="Heading_20_4" style:list-style-name="">
      <style:text-properties fo:color="#ff0000" loext:opacity="100%"/>
    </style:style>
    <style:style style:name="P97" style:family="paragraph" style:parent-style-name="Heading_20_5" style:list-style-name=""/>
    <style:style style:name="P98" style:family="paragraph" style:parent-style-name="Standard">
      <style:paragraph-properties fo:margin-left="0cm" fo:text-indent="0cm" style:auto-text-indent="false"/>
      <style:text-properties style:font-name="Consolas" fo:font-size="10pt" officeooo:paragraph-rsid="02157635" style:font-size-asian="10pt" style:font-size-complex="10pt"/>
    </style:style>
    <style:style style:name="P99" style:family="paragraph" style:parent-style-name="Standard">
      <style:text-properties officeooo:paragraph-rsid="020cbe10"/>
    </style:style>
    <style:style style:name="P100" style:family="paragraph" style:parent-style-name="Standard">
      <style:text-properties fo:color="#2a00ff" loext:opacity="100%" style:font-name="Consolas" fo:font-size="10pt" officeooo:rsid="01920ea7" officeooo:paragraph-rsid="020cbe10" style:font-size-asian="10pt" style:font-size-complex="10pt"/>
    </style:style>
    <style:style style:name="P101" style:family="paragraph" style:parent-style-name="Standard">
      <style:text-properties fo:color="#2a00ff" loext:opacity="100%" style:font-name="Consolas" fo:font-size="10pt" fo:font-style="italic" officeooo:rsid="0194930d" officeooo:paragraph-rsid="020cbe10" style:font-size-asian="10pt" style:font-style-asian="italic" style:font-size-complex="10pt" style:font-style-complex="italic"/>
    </style:style>
    <style:style style:name="P102" style:family="paragraph" style:parent-style-name="Text_20_body">
      <style:text-properties fo:font-weight="normal" officeooo:rsid="01fc099e" officeooo:paragraph-rsid="01fc099e" style:font-weight-asian="normal" style:font-weight-complex="normal"/>
    </style:style>
    <style:style style:name="P103" style:family="paragraph" style:parent-style-name="Standard">
      <style:text-properties officeooo:rsid="0265bfe5" officeooo:paragraph-rsid="0265bfe5"/>
    </style:style>
    <style:style style:name="P104" style:family="paragraph" style:parent-style-name="Standard">
      <style:paragraph-properties fo:margin-left="0cm" fo:text-indent="0cm" style:auto-text-indent="false"/>
      <style:text-properties style:font-name="Consolas" fo:font-size="10pt" officeooo:paragraph-rsid="0268bbe1" style:font-size-asian="10pt" style:font-size-complex="10pt"/>
    </style:style>
    <style:style style:name="P105" style:family="paragraph" style:parent-style-name="Standard">
      <style:text-properties officeooo:paragraph-rsid="0268bbe1"/>
    </style:style>
    <style:style style:name="P106" style:family="paragraph" style:parent-style-name="Standard">
      <style:text-properties fo:color="#2a00ff" loext:opacity="100%" style:font-name="Consolas" fo:font-size="10pt" officeooo:rsid="01920ea7" officeooo:paragraph-rsid="027990e4" style:font-size-asian="10pt" style:font-size-complex="10pt"/>
    </style:style>
    <style:style style:name="P107" style:family="paragraph" style:parent-style-name="Standard">
      <style:text-properties fo:color="#2a00ff" loext:opacity="100%" style:font-name="Consolas" fo:font-size="10pt" fo:font-style="italic" officeooo:rsid="026d686f" officeooo:paragraph-rsid="027990e4" style:font-size-asian="10pt" style:font-style-asian="italic" style:font-size-complex="10pt" style:font-style-complex="italic"/>
    </style:style>
    <style:style style:name="P108" style:family="paragraph" style:parent-style-name="Standard">
      <style:text-properties officeooo:rsid="02c82682" officeooo:paragraph-rsid="02c82682"/>
    </style:style>
    <style:style style:name="P109" style:family="paragraph" style:parent-style-name="Standard">
      <style:text-properties fo:font-style="italic" style:font-style-asian="italic" style:font-style-complex="italic"/>
    </style:style>
    <style:style style:name="P110" style:family="paragraph" style:parent-style-name="Standard">
      <style:text-properties officeooo:rsid="02837825" officeooo:paragraph-rsid="02837825"/>
    </style:style>
    <style:style style:name="P111" style:family="paragraph" style:parent-style-name="Standard">
      <style:text-properties officeooo:paragraph-rsid="028527ad"/>
    </style:style>
    <style:style style:name="P112" style:family="paragraph" style:parent-style-name="Standard">
      <style:text-properties fo:color="#2a00ff" loext:opacity="100%" style:font-name="Consolas" fo:font-size="10pt" fo:font-style="italic" officeooo:rsid="026d686f" officeooo:paragraph-rsid="028527ad" style:font-size-asian="10pt" style:font-style-asian="italic" style:font-size-complex="10pt" style:font-style-complex="italic"/>
    </style:style>
    <style:style style:name="P113" style:family="paragraph" style:parent-style-name="Standard">
      <style:text-properties officeooo:rsid="02837825" officeooo:paragraph-rsid="028996a0"/>
    </style:style>
    <style:style style:name="P114" style:family="paragraph" style:parent-style-name="Standard">
      <style:text-properties officeooo:paragraph-rsid="028996a0"/>
    </style:style>
    <style:style style:name="P115" style:family="paragraph" style:parent-style-name="Standard" style:list-style-name="L3">
      <style:text-properties officeooo:rsid="02399bc1" officeooo:paragraph-rsid="02399bc1"/>
    </style:style>
    <style:style style:name="P116" style:family="paragraph" style:parent-style-name="Standard" style:list-style-name="L3">
      <style:text-properties officeooo:rsid="023c3308" officeooo:paragraph-rsid="023c3308"/>
    </style:style>
    <style:style style:name="P117" style:family="paragraph" style:parent-style-name="Standard" style:list-style-name="L3">
      <style:text-properties officeooo:rsid="023ebf50" officeooo:paragraph-rsid="023ebf50"/>
    </style:style>
    <style:style style:name="P118" style:family="paragraph" style:parent-style-name="Standard">
      <style:text-properties officeooo:rsid="023ebf50" officeooo:paragraph-rsid="023ebf50"/>
    </style:style>
    <style:style style:name="P119" style:family="paragraph" style:parent-style-name="Standard">
      <style:text-properties fo:font-style="italic" officeooo:rsid="024725c3" officeooo:paragraph-rsid="024725c3" style:font-style-asian="italic" style:font-style-complex="italic"/>
    </style:style>
    <style:style style:name="P120" style:family="paragraph" style:parent-style-name="Standard" style:list-style-name="L4">
      <style:text-properties fo:font-style="italic" officeooo:rsid="024725c3" officeooo:paragraph-rsid="024725c3" style:font-style-asian="italic" style:font-style-complex="italic"/>
    </style:style>
    <style:style style:name="P121" style:family="paragraph" style:parent-style-name="Standard">
      <style:text-properties fo:font-style="italic" officeooo:rsid="024725c3" officeooo:paragraph-rsid="02ef0835" style:font-style-asian="italic" style:font-style-complex="italic"/>
    </style:style>
    <style:style style:name="P122" style:family="paragraph" style:parent-style-name="Standard">
      <style:paragraph-properties fo:margin-left="0cm" fo:text-indent="0cm" style:auto-text-indent="false"/>
      <style:text-properties officeooo:paragraph-rsid="02ef0835"/>
    </style:style>
    <style:style style:name="P123" style:family="paragraph" style:parent-style-name="Standard">
      <style:text-properties fo:color="#2a00ff" loext:opacity="100%" style:font-name="Consolas" fo:font-size="10pt" officeooo:paragraph-rsid="02ef0835" style:font-size-asian="10pt" style:font-size-complex="10pt"/>
    </style:style>
    <style:style style:name="P124" style:family="paragraph" style:parent-style-name="Standard">
      <style:text-properties officeooo:paragraph-rsid="02ef0835"/>
    </style:style>
    <style:style style:name="P125" style:family="paragraph" style:parent-style-name="Standard">
      <style:text-properties style:use-window-font-color="true" loext:opacity="0%" officeooo:paragraph-rsid="02f0a4d6"/>
    </style:style>
    <style:style style:name="P126" style:family="paragraph" style:parent-style-name="Standard">
      <style:text-properties fo:color="#2a00ff" loext:opacity="100%" style:font-name="Consolas" fo:font-size="10pt" officeooo:paragraph-rsid="02f0a4d6" style:font-size-asian="10pt" style:font-size-complex="10pt"/>
    </style:style>
    <style:style style:name="P127" style:family="paragraph" style:parent-style-name="Standard" style:list-style-name="L5">
      <style:text-properties fo:color="#ff0000" loext:opacity="100%" fo:font-weight="bold" officeooo:rsid="025722c2" style:font-weight-asian="bold" style:font-weight-complex="bold"/>
    </style:style>
    <style:style style:name="P128" style:family="paragraph" style:parent-style-name="Standard">
      <style:text-properties fo:color="#ff0000" loext:opacity="100%" fo:font-weight="bold" officeooo:rsid="025722c2" style:font-weight-asian="bold" style:font-weight-complex="bold"/>
    </style:style>
    <style:style style:name="P129" style:family="paragraph" style:parent-style-name="Heading_20_4" style:list-style-name=""/>
    <style:style style:name="P130" style:family="paragraph" style:parent-style-name="Standard">
      <style:text-properties fo:color="#ff0000" loext:opacity="100%" fo:font-weight="bold" style:font-weight-asian="bold" style:font-weight-complex="bold"/>
    </style:style>
    <style:style style:name="P131" style:family="paragraph" style:parent-style-name="Standard">
      <style:text-properties officeooo:rsid="0296d86e" officeooo:paragraph-rsid="0296d86e"/>
    </style:style>
    <style:style style:name="P132" style:family="paragraph" style:parent-style-name="Standard">
      <style:text-properties officeooo:rsid="02c82682" officeooo:paragraph-rsid="03485be8"/>
    </style:style>
    <style:style style:name="P133" style:family="paragraph" style:parent-style-name="Standard">
      <style:text-properties officeooo:paragraph-rsid="03485be8"/>
    </style:style>
    <style:style style:name="P134" style:family="paragraph" style:parent-style-name="Text_20_body">
      <style:text-properties officeooo:rsid="02993ee6" officeooo:paragraph-rsid="02993ee6"/>
    </style:style>
    <style:style style:name="P135" style:family="paragraph" style:parent-style-name="Standard">
      <style:paragraph-properties fo:margin-left="0cm" fo:text-indent="0cm" style:auto-text-indent="false"/>
      <style:text-properties style:font-name="Consolas" fo:font-size="10pt" officeooo:paragraph-rsid="029b2a6d" style:font-size-asian="10pt" style:font-size-complex="10pt"/>
    </style:style>
    <style:style style:name="P136" style:family="paragraph" style:parent-style-name="Standard">
      <style:text-properties officeooo:paragraph-rsid="029b2a6d"/>
    </style:style>
    <style:style style:name="P137" style:family="paragraph" style:parent-style-name="Standard">
      <style:text-properties fo:color="#2a00ff" loext:opacity="100%" style:font-name="Consolas" fo:font-size="10pt" officeooo:rsid="01920ea7" officeooo:paragraph-rsid="029b43a6" style:font-size-asian="10pt" style:font-size-complex="10pt"/>
    </style:style>
    <style:style style:name="P138" style:family="paragraph" style:parent-style-name="Standard">
      <style:text-properties officeooo:rsid="0340c706" officeooo:paragraph-rsid="0340c706"/>
    </style:style>
    <style:style style:name="P139" style:family="paragraph" style:parent-style-name="Standard">
      <style:text-properties officeooo:rsid="02837825" officeooo:paragraph-rsid="02be519e"/>
    </style:style>
    <style:style style:name="P140" style:family="paragraph" style:parent-style-name="Standard">
      <style:text-properties officeooo:paragraph-rsid="02b2942f"/>
    </style:style>
    <style:style style:name="P141" style:family="paragraph" style:parent-style-name="Standard">
      <style:text-properties fo:color="#2a00ff" loext:opacity="100%" style:font-name="Consolas" fo:font-size="10pt" fo:font-style="italic" officeooo:rsid="026d686f" officeooo:paragraph-rsid="02b2942f" style:font-size-asian="10pt" style:font-style-asian="italic" style:font-size-complex="10pt" style:font-style-complex="italic"/>
    </style:style>
    <style:style style:name="P142" style:family="paragraph" style:parent-style-name="Standard">
      <style:text-properties officeooo:rsid="02837825" officeooo:paragraph-rsid="02d377d5"/>
    </style:style>
    <style:style style:name="P143" style:family="paragraph" style:parent-style-name="Standard">
      <style:text-properties officeooo:paragraph-rsid="02d4dd1a"/>
    </style:style>
    <style:style style:name="P144" style:family="paragraph" style:parent-style-name="Standard" style:list-style-name="L3">
      <style:text-properties officeooo:rsid="02399bc1" officeooo:paragraph-rsid="02b2942f"/>
    </style:style>
    <style:style style:name="P145" style:family="paragraph" style:parent-style-name="Standard" style:list-style-name="L3">
      <style:text-properties officeooo:rsid="023c3308" officeooo:paragraph-rsid="02b2942f"/>
    </style:style>
    <style:style style:name="P146" style:family="paragraph" style:parent-style-name="Standard" style:list-style-name="L3">
      <style:text-properties officeooo:rsid="023ebf50" officeooo:paragraph-rsid="02b2942f"/>
    </style:style>
    <style:style style:name="P147" style:family="paragraph" style:parent-style-name="Standard">
      <style:text-properties officeooo:rsid="023ebf50" officeooo:paragraph-rsid="02b2942f"/>
    </style:style>
    <style:style style:name="P148" style:family="paragraph" style:parent-style-name="Standard">
      <style:text-properties fo:font-style="italic" officeooo:rsid="024725c3" officeooo:paragraph-rsid="02b2942f" style:font-style-asian="italic" style:font-style-complex="italic"/>
    </style:style>
    <style:style style:name="P149" style:family="paragraph" style:parent-style-name="Standard" style:list-style-name="L6">
      <style:text-properties fo:font-style="italic" officeooo:rsid="024725c3" officeooo:paragraph-rsid="02b2942f" style:font-style-asian="italic" style:font-style-complex="italic"/>
    </style:style>
    <style:style style:name="P150" style:family="paragraph" style:parent-style-name="Standard">
      <style:paragraph-properties fo:margin-left="0cm" fo:text-indent="0cm" style:auto-text-indent="false"/>
      <style:text-properties officeooo:paragraph-rsid="02ed8749"/>
    </style:style>
    <style:style style:name="P151" style:family="paragraph" style:parent-style-name="Standard">
      <style:text-properties fo:color="#2a00ff" loext:opacity="100%" style:font-name="Consolas" fo:font-size="10pt" officeooo:paragraph-rsid="02dde310" style:font-size-asian="10pt" style:font-size-complex="10pt"/>
    </style:style>
    <style:style style:name="P152" style:family="paragraph" style:parent-style-name="Standard">
      <style:text-properties fo:color="#2a00ff" loext:opacity="100%" style:font-name="Consolas" fo:font-size="10pt" officeooo:rsid="03323497" officeooo:paragraph-rsid="02f6f1cb" style:font-size-asian="10pt" style:font-size-complex="10pt"/>
    </style:style>
    <style:style style:name="P153" style:family="paragraph" style:parent-style-name="Standard">
      <style:text-properties officeooo:rsid="02c82682" officeooo:paragraph-rsid="0348b566"/>
    </style:style>
    <style:style style:name="P154" style:family="paragraph" style:parent-style-name="Standard">
      <style:text-properties officeooo:paragraph-rsid="0348b566"/>
    </style:style>
    <style:style style:name="P155" style:family="paragraph" style:parent-style-name="Standard">
      <style:text-properties officeooo:rsid="02e08979" officeooo:paragraph-rsid="02e08979"/>
    </style:style>
    <style:style style:name="P156" style:family="paragraph" style:parent-style-name="Standard">
      <style:paragraph-properties fo:margin-left="0cm" fo:text-indent="0cm" style:auto-text-indent="false"/>
      <style:text-properties officeooo:paragraph-rsid="02f6b5b0"/>
    </style:style>
    <style:style style:name="P157" style:family="paragraph" style:parent-style-name="Standard">
      <style:text-properties fo:color="#2a00ff" loext:opacity="100%" style:font-name="Consolas" fo:font-size="10pt" officeooo:rsid="015438b7" officeooo:paragraph-rsid="02f6ec77" style:font-size-asian="10pt" style:font-size-complex="10pt"/>
    </style:style>
    <style:style style:name="P158" style:family="paragraph" style:parent-style-name="Standard">
      <style:text-properties fo:color="#2a00ff" loext:opacity="100%" style:font-name="Consolas" fo:font-size="10pt" officeooo:paragraph-rsid="02f6b5b0" style:font-size-asian="10pt" style:font-size-complex="10pt"/>
    </style:style>
    <style:style style:name="P159" style:family="paragraph" style:parent-style-name="Standard">
      <style:paragraph-properties fo:break-before="page"/>
      <style:text-properties officeooo:rsid="02e08979" officeooo:paragraph-rsid="02e08979"/>
    </style:style>
    <style:style style:name="P160" style:family="paragraph" style:parent-style-name="Standard">
      <style:paragraph-properties fo:margin-left="0cm" fo:text-indent="0cm" style:auto-text-indent="false"/>
      <style:text-properties officeooo:paragraph-rsid="01c46ccb"/>
    </style:style>
    <style:style style:name="P161" style:family="paragraph" style:parent-style-name="Text_20_body">
      <style:text-properties officeooo:rsid="006230c6" officeooo:paragraph-rsid="00c323ec"/>
    </style:style>
    <style:style style:name="P162" style:family="paragraph" style:parent-style-name="Standard">
      <style:text-properties officeooo:paragraph-rsid="01c46ccb"/>
    </style:style>
    <style:style style:name="P163" style:family="paragraph" style:parent-style-name="Standard">
      <style:paragraph-properties style:writing-mode="lr-tb" style:writing-mode-automatic="false"/>
      <style:text-properties style:text-underline-style="solid" style:text-underline-type="double" style:text-underline-width="auto" style:text-underline-color="font-color" officeooo:paragraph-rsid="01d0f895"/>
    </style:style>
    <style:style style:name="P164" style:family="paragraph" style:parent-style-name="Text_20_body">
      <style:text-properties officeooo:rsid="005ac488" officeooo:paragraph-rsid="00c323ec"/>
    </style:style>
    <style:style style:name="P165" style:family="paragraph" style:parent-style-name="Standard">
      <style:paragraph-properties fo:margin-left="0cm" fo:text-indent="0cm" style:auto-text-indent="false"/>
      <style:text-properties officeooo:paragraph-rsid="01e42033"/>
    </style:style>
    <style:style style:name="P166" style:family="paragraph" style:parent-style-name="Standard">
      <style:text-properties officeooo:paragraph-rsid="01e42033"/>
    </style:style>
    <style:style style:name="P167" style:family="paragraph" style:parent-style-name="Standard">
      <style:text-properties fo:color="#2a00ff" loext:opacity="100%" style:font-name="Consolas" fo:font-size="10pt" officeooo:paragraph-rsid="01d6e204" style:font-size-asian="10pt" style:font-size-complex="10pt"/>
    </style:style>
    <style:style style:name="P168" style:family="paragraph" style:parent-style-name="Standard">
      <style:text-properties officeooo:paragraph-rsid="00d21149"/>
    </style:style>
    <style:style style:name="P169" style:family="paragraph" style:parent-style-name="Standard">
      <style:text-properties officeooo:paragraph-rsid="00d41464"/>
    </style:style>
    <style:style style:name="P170" style:family="paragraph" style:parent-style-name="Standard">
      <style:text-properties officeooo:paragraph-rsid="00d4c265"/>
    </style:style>
    <style:style style:name="P171" style:family="paragraph" style:parent-style-name="Text_20_body">
      <style:text-properties officeooo:rsid="0070c021" officeooo:paragraph-rsid="007198c7"/>
    </style:style>
    <style:style style:name="P172" style:family="paragraph" style:parent-style-name="Standard" style:list-style-name="L7"/>
    <style:style style:name="P173" style:family="paragraph" style:parent-style-name="Standard" style:list-style-name="L7">
      <style:text-properties officeooo:rsid="0075740a" officeooo:paragraph-rsid="00795655"/>
    </style:style>
    <style:style style:name="P174" style:family="paragraph" style:parent-style-name="Standard">
      <style:text-properties fo:font-weight="normal" officeooo:rsid="006ed0a8" officeooo:paragraph-rsid="00795655" style:font-weight-asian="normal" style:font-weight-complex="normal"/>
    </style:style>
    <style:style style:name="P175" style:family="paragraph" style:parent-style-name="Standard">
      <style:text-properties officeooo:paragraph-rsid="01d87619"/>
    </style:style>
    <style:style style:name="P176" style:family="paragraph" style:parent-style-name="Standard">
      <style:text-properties officeooo:rsid="0075740a" officeooo:paragraph-rsid="009ed6d8"/>
    </style:style>
    <style:style style:name="P177" style:family="paragraph" style:parent-style-name="Standard">
      <style:text-properties officeooo:rsid="00a25f9a" officeooo:paragraph-rsid="00da176e"/>
    </style:style>
    <style:style style:name="P178" style:family="paragraph" style:parent-style-name="Standard">
      <style:text-properties officeooo:paragraph-rsid="00df8854"/>
    </style:style>
    <style:style style:name="P179" style:family="paragraph" style:parent-style-name="Standard">
      <style:text-properties officeooo:paragraph-rsid="01cca316"/>
    </style:style>
    <style:style style:name="P180" style:family="paragraph" style:parent-style-name="Standard">
      <style:text-properties officeooo:rsid="008b9519" officeooo:paragraph-rsid="01cca316"/>
    </style:style>
    <style:style style:name="P181" style:family="paragraph" style:parent-style-name="Text_20_body">
      <style:text-properties officeooo:rsid="0070c021" officeooo:paragraph-rsid="00a434d0"/>
    </style:style>
    <style:style style:name="P182" style:family="paragraph" style:parent-style-name="Standard" style:list-style-name="L7">
      <style:text-properties officeooo:paragraph-rsid="00a434d0"/>
    </style:style>
    <style:style style:name="P183" style:family="paragraph" style:parent-style-name="Standard" style:list-style-name="L7">
      <style:text-properties officeooo:rsid="0075740a" officeooo:paragraph-rsid="00a434d0"/>
    </style:style>
    <style:style style:name="P184" style:family="paragraph" style:parent-style-name="Standard">
      <style:text-properties officeooo:rsid="0075740a" officeooo:paragraph-rsid="00a434d0"/>
    </style:style>
    <style:style style:name="P185" style:family="paragraph" style:parent-style-name="Standard">
      <style:text-properties officeooo:paragraph-rsid="01da0158"/>
    </style:style>
    <style:style style:name="P186" style:family="paragraph" style:parent-style-name="Standard">
      <style:text-properties officeooo:rsid="00a7fd26" officeooo:paragraph-rsid="00eaef55"/>
    </style:style>
    <style:style style:name="P187" style:family="paragraph" style:parent-style-name="Standard">
      <style:text-properties officeooo:paragraph-rsid="00ef74a1"/>
    </style:style>
    <style:style style:name="P188" style:family="paragraph" style:parent-style-name="Standard">
      <style:text-properties officeooo:paragraph-rsid="01ce83b3"/>
    </style:style>
    <style:style style:name="P189" style:family="paragraph" style:parent-style-name="Standard">
      <style:text-properties officeooo:rsid="008b9519" officeooo:paragraph-rsid="01ce83b3"/>
    </style:style>
    <style:style style:name="P190" style:family="paragraph" style:parent-style-name="Text_20_body">
      <style:text-properties officeooo:rsid="0070c021" officeooo:paragraph-rsid="00a7fd26"/>
    </style:style>
    <style:style style:name="P191" style:family="paragraph" style:parent-style-name="Standard" style:list-style-name="L7">
      <style:text-properties officeooo:paragraph-rsid="00a7fd26"/>
    </style:style>
    <style:style style:name="P192" style:family="paragraph" style:parent-style-name="Standard" style:list-style-name="L7">
      <style:text-properties officeooo:paragraph-rsid="00f3be8a"/>
    </style:style>
    <style:style style:name="P193" style:family="paragraph" style:parent-style-name="Standard">
      <style:text-properties style:text-underline-style="solid" style:text-underline-type="double" style:text-underline-width="auto" style:text-underline-color="font-color" officeooo:paragraph-rsid="01dcd5e1"/>
    </style:style>
    <style:style style:name="P194" style:family="paragraph" style:parent-style-name="Heading_20_1">
      <style:paragraph-properties fo:break-before="page"/>
    </style:style>
    <style:style style:name="P195" style:family="paragraph" style:parent-style-name="Text_20_body" style:list-style-name="L8"/>
    <style:style style:name="P196" style:family="paragraph" style:parent-style-name="Text_20_body" style:list-style-name="L9">
      <style:text-properties officeooo:rsid="01a1ca89" officeooo:paragraph-rsid="01a1ca89"/>
    </style:style>
    <style:style style:name="P197" style:family="paragraph" style:parent-style-name="Text_20_body" style:list-style-name="L9">
      <style:text-properties officeooo:paragraph-rsid="01a29867"/>
    </style:style>
    <style:style style:name="P198" style:family="paragraph" style:parent-style-name="Text_20_body" style:list-style-name="L9">
      <style:text-properties officeooo:rsid="01ba954f" officeooo:paragraph-rsid="01ba954f"/>
    </style:style>
    <style:style style:name="P199" style:family="paragraph" style:parent-style-name="Text_20_body" style:list-style-name="L9">
      <style:text-properties officeooo:rsid="01e5b69f" officeooo:paragraph-rsid="01e5b69f"/>
    </style:style>
    <style:style style:name="P200" style:family="paragraph" style:parent-style-name="Heading_20_2" style:list-style-name="">
      <style:text-properties officeooo:rsid="0113e348" officeooo:paragraph-rsid="013ef1dc"/>
    </style:style>
    <style:style style:name="P201" style:family="paragraph" style:parent-style-name="Text_20_body" style:list-style-name="L10">
      <style:text-properties fo:font-weight="bold" officeooo:rsid="02ec17aa" officeooo:paragraph-rsid="02ec17aa" style:font-weight-asian="bold" style:font-weight-complex="bold"/>
    </style:style>
    <style:style style:name="P202" style:family="paragraph" style:parent-style-name="Text_20_body" style:list-style-name="L10">
      <style:text-properties officeooo:rsid="0114f0fd" officeooo:paragraph-rsid="013ef1dc"/>
    </style:style>
    <style:style style:name="P203" style:family="paragraph" style:parent-style-name="Text_20_body" style:list-style-name="L10">
      <style:text-properties officeooo:rsid="011e58e9" officeooo:paragraph-rsid="013ef1dc"/>
    </style:style>
    <style:style style:name="P204" style:family="paragraph" style:parent-style-name="Text_20_body" style:list-style-name="L10">
      <style:text-properties officeooo:rsid="019ccc58" officeooo:paragraph-rsid="019ccc58"/>
    </style:style>
    <style:style style:name="P205" style:family="paragraph" style:parent-style-name="Text_20_body" style:list-style-name="L10">
      <style:text-properties officeooo:rsid="01be8f1b" officeooo:paragraph-rsid="01be8f1b"/>
    </style:style>
    <style:style style:name="P206" style:family="paragraph" style:parent-style-name="Text_20_body" style:list-style-name="L10">
      <style:text-properties officeooo:rsid="02044572" officeooo:paragraph-rsid="02044572"/>
    </style:style>
    <style:style style:name="P207" style:family="paragraph" style:parent-style-name="Text_20_body" style:list-style-name="L10">
      <style:text-properties officeooo:rsid="0205cf95" officeooo:paragraph-rsid="0205cf95"/>
    </style:style>
    <style:style style:name="P208" style:family="paragraph" style:parent-style-name="Text_20_body" style:list-style-name="L10">
      <style:text-properties fo:font-weight="bold" officeooo:rsid="02346a2a" officeooo:paragraph-rsid="02346a2a" style:font-weight-asian="bold" style:font-weight-complex="bold"/>
    </style:style>
    <style:style style:name="P209" style:family="paragraph" style:parent-style-name="Text_20_body" style:list-style-name="L10">
      <style:text-properties fo:font-weight="bold" officeooo:rsid="02e35fad" officeooo:paragraph-rsid="02e35fad" style:font-weight-asian="bold" style:font-weight-complex="bold"/>
    </style:style>
    <style:style style:name="P210" style:family="paragraph" style:parent-style-name="Heading_20_2" style:list-style-name="">
      <style:text-properties officeooo:paragraph-rsid="0111e026"/>
    </style:style>
    <style:style style:name="P211" style:family="paragraph" style:parent-style-name="Heading_20_3">
      <style:text-properties officeooo:paragraph-rsid="013a0d3a"/>
    </style:style>
    <style:style style:name="P212" style:family="paragraph" style:parent-style-name="Text_20_body">
      <style:text-properties officeooo:paragraph-rsid="00f065d2"/>
    </style:style>
    <style:style style:name="P213" style:family="paragraph" style:parent-style-name="Standard">
      <style:text-properties officeooo:paragraph-rsid="00f1c35e"/>
    </style:style>
    <style:style style:name="P214" style:family="paragraph" style:parent-style-name="Standard">
      <style:text-properties officeooo:rsid="008b9519" officeooo:paragraph-rsid="00f1c35e"/>
    </style:style>
    <style:style style:name="P215" style:family="paragraph" style:parent-style-name="Text_20_body">
      <style:text-properties officeooo:rsid="0070c021" officeooo:paragraph-rsid="00f1c35e"/>
    </style:style>
    <style:style style:name="P216" style:family="paragraph" style:parent-style-name="Standard" style:list-style-name="L7">
      <style:text-properties officeooo:paragraph-rsid="00f1c35e"/>
    </style:style>
    <style:style style:name="P217" style:family="paragraph" style:parent-style-name="Standard" style:list-style-name="L7">
      <style:text-properties officeooo:paragraph-rsid="00f578e6"/>
    </style:style>
    <style:style style:name="P218" style:family="paragraph" style:parent-style-name="Standard">
      <style:text-properties officeooo:rsid="0075740a" officeooo:paragraph-rsid="00f1c35e"/>
    </style:style>
    <style:style style:name="P219" style:family="paragraph" style:parent-style-name="Standard">
      <style:text-properties officeooo:rsid="00fbf967" officeooo:paragraph-rsid="00fbf967"/>
    </style:style>
    <style:style style:name="P220" style:family="paragraph" style:parent-style-name="Text_20_body">
      <style:text-properties officeooo:rsid="006230c6" officeooo:paragraph-rsid="00feec2a"/>
    </style:style>
    <style:style style:name="P221" style:family="paragraph" style:parent-style-name="Text_20_body">
      <style:text-properties officeooo:rsid="006230c6" officeooo:paragraph-rsid="00f6cd45"/>
    </style:style>
    <style:style style:name="P222" style:family="paragraph" style:parent-style-name="Text_20_body">
      <style:text-properties officeooo:rsid="0105c542" officeooo:paragraph-rsid="0105c542"/>
    </style:style>
    <style:style style:name="P223" style:family="paragraph" style:parent-style-name="Text_20_body">
      <style:text-properties officeooo:rsid="010bfc8b" officeooo:paragraph-rsid="010bfc8b"/>
    </style:style>
    <style:style style:name="P224" style:family="paragraph" style:parent-style-name="Text_20_body">
      <style:text-properties officeooo:rsid="0123bb9f" officeooo:paragraph-rsid="0123bb9f"/>
    </style:style>
    <style:style style:name="P225" style:family="paragraph" style:parent-style-name="Text_20_body">
      <style:text-properties fo:font-weight="bold" officeooo:rsid="02356c45" officeooo:paragraph-rsid="02356c45" style:font-weight-asian="bold" style:font-weight-complex="bold"/>
    </style:style>
    <style:style style:name="P226" style:family="paragraph" style:parent-style-name="Text_20_body" style:list-style-name="L11">
      <style:text-properties officeooo:rsid="01ed9a9b" officeooo:paragraph-rsid="01ed9a9b"/>
    </style:style>
    <style:style style:name="T1" style:family="text">
      <style:text-properties officeooo:rsid="00162296"/>
    </style:style>
    <style:style style:name="T2" style:family="text">
      <style:text-properties officeooo:rsid="00176c74"/>
    </style:style>
    <style:style style:name="T3" style:family="text">
      <style:text-properties officeooo:rsid="002ce14e"/>
    </style:style>
    <style:style style:name="T4" style:family="text">
      <style:text-properties officeooo:rsid="0039ce04"/>
    </style:style>
    <style:style style:name="T5" style:family="text">
      <style:text-properties officeooo:rsid="014e5dc6"/>
    </style:style>
    <style:style style:name="T6" style:family="text">
      <style:text-properties officeooo:rsid="014e9ef0"/>
    </style:style>
    <style:style style:name="T7" style:family="text">
      <style:text-properties officeooo:rsid="01508315"/>
    </style:style>
    <style:style style:name="T8" style:family="text">
      <style:text-properties officeooo:rsid="015241cf"/>
    </style:style>
    <style:style style:name="T9" style:family="text">
      <style:text-properties officeooo:rsid="01530af7"/>
    </style:style>
    <style:style style:name="T10" style:family="text">
      <style:text-properties officeooo:rsid="01552774"/>
    </style:style>
    <style:style style:name="T11" style:family="text">
      <style:text-properties style:font-name="Consolas" fo:font-size="10pt" officeooo:rsid="0156cd57" style:font-size-asian="10pt" style:font-size-complex="10pt"/>
    </style:style>
    <style:style style:name="T12" style:family="text">
      <style:text-properties style:font-name="Consolas" fo:font-size="10pt" officeooo:rsid="01552e56" style:font-size-asian="10pt" style:font-size-complex="10pt"/>
    </style:style>
    <style:style style:name="T13" style:family="text">
      <style:text-properties officeooo:rsid="01583d7e"/>
    </style:style>
    <style:style style:name="T14" style:family="text">
      <style:text-properties officeooo:rsid="0159e4ef"/>
    </style:style>
    <style:style style:name="T15" style:family="text">
      <style:text-properties style:font-name="Consolas" fo:font-size="10pt" officeooo:rsid="015a2847" style:font-size-asian="10pt" style:font-size-complex="10pt"/>
    </style:style>
    <style:style style:name="T16" style:family="text">
      <style:text-properties officeooo:rsid="015b08b9"/>
    </style:style>
    <style:style style:name="T17" style:family="text">
      <style:text-properties officeooo:rsid="00514265"/>
    </style:style>
    <style:style style:name="T18" style:family="text">
      <style:text-properties officeooo:rsid="001b71f1"/>
    </style:style>
    <style:style style:name="T19" style:family="text">
      <style:text-properties officeooo:rsid="011d3d9c"/>
    </style:style>
    <style:style style:name="T20" style:family="text">
      <style:text-properties officeooo:rsid="00202da0"/>
    </style:style>
    <style:style style:name="T21" style:family="text">
      <style:text-properties officeooo:rsid="001e381f"/>
    </style:style>
    <style:style style:name="T22" style:family="text">
      <style:text-properties officeooo:rsid="0021ff96"/>
    </style:style>
    <style:style style:name="T23" style:family="text">
      <style:text-properties style:font-name="Consolas" fo:font-size="10pt" officeooo:rsid="015ff8b4" style:font-size-asian="10pt" style:font-size-complex="10pt"/>
    </style:style>
    <style:style style:name="T24" style:family="text">
      <style:text-properties officeooo:rsid="01606f00"/>
    </style:style>
    <style:style style:name="T25" style:family="text">
      <style:text-properties officeooo:rsid="0163cca3"/>
    </style:style>
    <style:style style:name="T26" style:family="text">
      <style:text-properties style:font-name="Consolas" fo:font-size="10pt" officeooo:rsid="01645bd3" style:font-size-asian="10pt" style:font-size-complex="10pt"/>
    </style:style>
    <style:style style:name="T27" style:family="text">
      <style:text-properties officeooo:rsid="0166105f"/>
    </style:style>
    <style:style style:name="T28" style:family="text">
      <style:text-properties officeooo:rsid="0026c3f3"/>
    </style:style>
    <style:style style:name="T29" style:family="text">
      <style:text-properties officeooo:rsid="0028614d"/>
    </style:style>
    <style:style style:name="T30" style:family="text">
      <style:text-properties officeooo:rsid="002882cb"/>
    </style:style>
    <style:style style:name="T31" style:family="text">
      <style:text-properties style:font-name="Consolas" fo:font-size="10pt" officeooo:rsid="016b7a9a" style:font-size-asian="10pt" style:font-size-complex="10pt"/>
    </style:style>
    <style:style style:name="T32" style:family="text">
      <style:text-properties fo:color="#2a00ff" loext:opacity="100%" style:font-name="Consolas" fo:font-size="10pt" style:font-size-asian="10pt" style:font-size-complex="10pt"/>
    </style:style>
    <style:style style:name="T33" style:family="text">
      <style:text-properties fo:color="#2a00ff" loext:opacity="100%" style:font-name="Consolas" fo:font-size="10pt" officeooo:rsid="016cbc15" style:font-size-asian="10pt" style:font-size-complex="10pt"/>
    </style:style>
    <style:style style:name="T34" style:family="text">
      <style:text-properties officeooo:rsid="016cbc15"/>
    </style:style>
    <style:style style:name="T35" style:family="text">
      <style:text-properties officeooo:rsid="016e8198"/>
    </style:style>
    <style:style style:name="T36" style:family="text">
      <style:text-properties officeooo:rsid="017ceaad"/>
    </style:style>
    <style:style style:name="T37" style:family="text">
      <style:text-properties officeooo:rsid="002b9804"/>
    </style:style>
    <style:style style:name="T38" style:family="text">
      <style:text-properties officeooo:rsid="0041381c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0026c3f3"/>
    </style:style>
    <style:style style:name="T41" style:family="text">
      <style:text-properties style:text-underline-style="solid" style:text-underline-width="auto" style:text-underline-color="font-color" officeooo:rsid="002cd200"/>
    </style:style>
    <style:style style:name="T42" style:family="text">
      <style:text-properties officeooo:rsid="003286a6"/>
    </style:style>
    <style:style style:name="T43" style:family="text">
      <style:text-properties officeooo:rsid="002df37f"/>
    </style:style>
    <style:style style:name="T44" style:family="text">
      <style:text-properties officeooo:rsid="0032d098"/>
    </style:style>
    <style:style style:name="T45" style:family="text">
      <style:text-properties officeooo:rsid="002e5164"/>
    </style:style>
    <style:style style:name="T46" style:family="text">
      <style:text-properties officeooo:rsid="00344c6a"/>
    </style:style>
    <style:style style:name="T47" style:family="text">
      <style:text-properties officeooo:rsid="00363263"/>
    </style:style>
    <style:style style:name="T48" style:family="text">
      <style:text-properties officeooo:rsid="002fb426"/>
    </style:style>
    <style:style style:name="T49" style:family="text">
      <style:text-properties officeooo:rsid="00378b8c"/>
    </style:style>
    <style:style style:name="T50" style:family="text">
      <style:text-properties officeooo:rsid="002eed8c"/>
    </style:style>
    <style:style style:name="T51" style:family="text">
      <style:text-properties officeooo:rsid="00311572"/>
    </style:style>
    <style:style style:name="T52" style:family="text">
      <style:text-properties officeooo:rsid="003b9ef7"/>
    </style:style>
    <style:style style:name="T53" style:family="text">
      <style:text-properties officeooo:rsid="017a7eb2"/>
    </style:style>
    <style:style style:name="T54" style:family="text">
      <style:text-properties officeooo:rsid="003143fb"/>
    </style:style>
    <style:style style:name="T55" style:family="text">
      <style:text-properties officeooo:rsid="0041ca4a"/>
    </style:style>
    <style:style style:name="T56" style:family="text">
      <style:text-properties officeooo:rsid="017c5d55"/>
    </style:style>
    <style:style style:name="T57" style:family="text">
      <style:text-properties officeooo:rsid="00425ec0"/>
    </style:style>
    <style:style style:name="T58" style:family="text">
      <style:text-properties officeooo:rsid="003ba83c"/>
    </style:style>
    <style:style style:name="T59" style:family="text">
      <style:text-properties style:text-underline-style="solid" style:text-underline-width="auto" style:text-underline-color="font-color" officeooo:rsid="0028614d"/>
    </style:style>
    <style:style style:name="T60" style:family="text">
      <style:text-properties style:text-underline-style="solid" style:text-underline-width="auto" style:text-underline-color="font-color" officeooo:rsid="003d7e28"/>
    </style:style>
    <style:style style:name="T61" style:family="text">
      <style:text-properties officeooo:rsid="00445902"/>
    </style:style>
    <style:style style:name="T62" style:family="text">
      <style:text-properties officeooo:rsid="003adc26"/>
    </style:style>
    <style:style style:name="T63" style:family="text">
      <style:text-properties officeooo:rsid="003e0e5f"/>
    </style:style>
    <style:style style:name="T64" style:family="text">
      <style:text-properties style:text-underline-style="solid" style:text-underline-width="auto" style:text-underline-color="font-color" officeooo:rsid="00488c0e"/>
    </style:style>
    <style:style style:name="T65" style:family="text">
      <style:text-properties officeooo:rsid="00488c0e"/>
    </style:style>
    <style:style style:name="T66" style:family="text">
      <style:text-properties officeooo:rsid="0046c5d0"/>
    </style:style>
    <style:style style:name="T67" style:family="text">
      <style:text-properties officeooo:rsid="03583e77"/>
    </style:style>
    <style:style style:name="T68" style:family="text">
      <style:text-properties officeooo:rsid="0047e881"/>
    </style:style>
    <style:style style:name="T69" style:family="text">
      <style:text-properties officeooo:rsid="00180e10"/>
    </style:style>
    <style:style style:name="T70" style:family="text">
      <style:text-properties officeooo:rsid="0049d641"/>
    </style:style>
    <style:style style:name="T71" style:family="text">
      <style:text-properties officeooo:rsid="0185874e"/>
    </style:style>
    <style:style style:name="T72" style:family="text">
      <style:text-properties officeooo:rsid="0183eb5e"/>
    </style:style>
    <style:style style:name="T73" style:family="text">
      <style:text-properties style:text-underline-style="solid" style:text-underline-width="auto" style:text-underline-color="font-color" officeooo:rsid="004d6d32"/>
    </style:style>
    <style:style style:name="T74" style:family="text">
      <style:text-properties officeooo:rsid="01e30a1c"/>
    </style:style>
    <style:style style:name="T75" style:family="text">
      <style:text-properties officeooo:rsid="004d6d32"/>
    </style:style>
    <style:style style:name="T76" style:family="text">
      <style:text-properties officeooo:rsid="004edd90"/>
    </style:style>
    <style:style style:name="T77" style:family="text">
      <style:text-properties officeooo:rsid="004f9ab6"/>
    </style:style>
    <style:style style:name="T78" style:family="text">
      <style:text-properties officeooo:rsid="003d7e28"/>
    </style:style>
    <style:style style:name="T79" style:family="text">
      <style:text-properties style:font-name="Consolas" fo:font-size="10pt" officeooo:rsid="017306e0" style:font-size-asian="10pt" style:font-size-complex="10pt"/>
    </style:style>
    <style:style style:name="T80" style:family="text">
      <style:text-properties fo:color="#2a00ff" loext:opacity="100%" style:font-name="Consolas" fo:font-size="10pt" officeooo:rsid="0174a146" style:font-size-asian="10pt" style:font-size-complex="10pt"/>
    </style:style>
    <style:style style:name="T81" style:family="text">
      <style:text-properties officeooo:rsid="0174a146"/>
    </style:style>
    <style:style style:name="T82" style:family="text">
      <style:text-properties fo:color="#2a00ff" loext:opacity="100%" style:font-name="Consolas" fo:font-size="10pt" officeooo:rsid="0191af67" style:font-size-asian="10pt" style:font-size-complex="10pt"/>
    </style:style>
    <style:style style:name="T83" style:family="text">
      <style:text-properties fo:color="#2a00ff" loext:opacity="100%" style:font-name="Consolas" fo:font-size="10pt" officeooo:rsid="018f37fa" style:font-size-asian="10pt" style:font-size-complex="10pt"/>
    </style:style>
    <style:style style:name="T84" style:family="text">
      <style:text-properties fo:color="#2a00ff" loext:opacity="100%" style:font-name="Consolas" fo:font-size="10pt" officeooo:rsid="0178afd0" style:font-size-asian="10pt" style:font-size-complex="10pt"/>
    </style:style>
    <style:style style:name="T85" style:family="text">
      <style:text-properties officeooo:rsid="01976995"/>
    </style:style>
    <style:style style:name="T86" style:family="text">
      <style:text-properties officeooo:rsid="019a728b"/>
    </style:style>
    <style:style style:name="T87" style:family="text">
      <style:text-properties fo:font-style="italic" officeooo:rsid="0198437b" style:font-style-asian="italic" style:font-style-complex="italic"/>
    </style:style>
    <style:style style:name="T88" style:family="text">
      <style:text-properties fo:font-style="italic" officeooo:rsid="0194930d" style:font-style-asian="italic" style:font-style-complex="italic"/>
    </style:style>
    <style:style style:name="T89" style:family="text">
      <style:text-properties style:font-name="Consolas" fo:font-size="10pt" officeooo:rsid="019b9b46" style:font-size-asian="10pt" style:font-size-complex="10pt"/>
    </style:style>
    <style:style style:name="T90" style:family="text">
      <style:text-properties fo:color="#2a00ff" loext:opacity="100%" style:font-name="Consolas" fo:font-size="10pt" officeooo:rsid="01b28c95" style:font-size-asian="10pt" style:font-size-complex="10pt"/>
    </style:style>
    <style:style style:name="T91" style:family="text">
      <style:text-properties officeooo:rsid="01b28c95"/>
    </style:style>
    <style:style style:name="T92" style:family="text">
      <style:text-properties officeooo:rsid="01aa8689"/>
    </style:style>
    <style:style style:name="T93" style:family="text">
      <style:text-properties officeooo:rsid="0358ab16"/>
    </style:style>
    <style:style style:name="T94" style:family="text">
      <style:text-properties fo:color="#2a00ff" loext:opacity="100%" style:font-name="Consolas" fo:font-size="10pt" officeooo:rsid="01920ea7" style:font-size-asian="10pt" style:font-size-complex="10pt"/>
    </style:style>
    <style:style style:name="T95" style:family="text">
      <style:text-properties fo:color="#2a00ff" loext:opacity="100%" style:font-name="Consolas1" fo:font-size="10pt" fo:background-color="#e8f2fe" loext:char-shading-value="0" style:font-size-asian="10pt"/>
    </style:style>
    <style:style style:name="T96" style:family="text">
      <style:text-properties fo:font-style="italic" officeooo:rsid="01ad0992" style:font-style-asian="italic" style:font-style-complex="italic"/>
    </style:style>
    <style:style style:name="T97" style:family="text">
      <style:text-properties fo:font-style="italic" officeooo:rsid="01ae58bd" style:font-style-asian="italic" style:font-style-complex="italic"/>
    </style:style>
    <style:style style:name="T98" style:family="text">
      <style:text-properties fo:font-style="italic" officeooo:rsid="01b5d5ae" style:font-style-asian="italic" style:font-style-complex="italic"/>
    </style:style>
    <style:style style:name="T99" style:family="text">
      <style:text-properties officeooo:rsid="0324846a"/>
    </style:style>
    <style:style style:name="T100" style:family="text">
      <style:text-properties officeooo:rsid="0324dd97"/>
    </style:style>
    <style:style style:name="T101" style:family="text">
      <style:text-properties fo:color="#000000" loext:opacity="100%" style:font-name="Consolas1" fo:font-size="10pt" officeooo:rsid="0324dd97" fo:background-color="#e8f2fe" loext:char-shading-value="0" style:font-size-asian="10pt"/>
    </style:style>
    <style:style style:name="T102" style:family="text">
      <style:text-properties style:font-name="Consolas1" fo:font-size="10pt" style:font-size-asian="10pt"/>
    </style:style>
    <style:style style:name="T103" style:family="text">
      <style:text-properties fo:color="#000000" loext:opacity="100%" style:font-name="Consolas1" fo:font-size="10pt" style:font-size-asian="10pt"/>
    </style:style>
    <style:style style:name="T104" style:family="text">
      <style:text-properties fo:color="#7f0055" loext:opacity="100%" style:font-name="Consolas1" fo:font-size="10pt" fo:font-weight="bold" style:font-size-asian="10pt" style:font-weight-asian="bold"/>
    </style:style>
    <style:style style:name="T105" style:family="text">
      <style:text-properties fo:color="#0000c0" loext:opacity="100%" style:font-name="Consolas1" fo:font-size="10pt" style:font-size-asian="10pt"/>
    </style:style>
    <style:style style:name="T106" style:family="text">
      <style:text-properties fo:color="#0000c0" loext:opacity="100%" style:font-name="Consolas1" fo:font-size="10pt" officeooo:rsid="0354dece" style:font-size-asian="10pt"/>
    </style:style>
    <style:style style:name="T107" style:family="text">
      <style:text-properties officeooo:rsid="033417ad"/>
    </style:style>
    <style:style style:name="T108" style:family="text">
      <style:text-properties officeooo:rsid="0355c264"/>
    </style:style>
    <style:style style:name="T109" style:family="text">
      <style:text-properties style:font-name="Consolas" fo:font-size="10pt" style:font-size-asian="10pt" style:font-size-complex="10pt"/>
    </style:style>
    <style:style style:name="T110" style:family="text">
      <style:text-properties style:font-name="Consolas" fo:font-size="10pt" officeooo:rsid="024bed9a" style:font-size-asian="10pt" style:font-size-complex="10pt"/>
    </style:style>
    <style:style style:name="T111" style:family="text">
      <style:text-properties fo:color="#2a00ff" loext:opacity="100%" style:font-name="Consolas" fo:font-size="10pt" officeooo:rsid="02f1eb95" style:font-size-asian="10pt" style:font-size-complex="10pt"/>
    </style:style>
    <style:style style:name="T112" style:family="text">
      <style:text-properties officeooo:rsid="02f1eb95"/>
    </style:style>
    <style:style style:name="T113" style:family="text">
      <style:text-properties officeooo:rsid="02f6d787"/>
    </style:style>
    <style:style style:name="T114" style:family="text">
      <style:text-properties fo:color="#2a00ff" loext:opacity="100%" style:font-name="Consolas" fo:font-size="10pt" officeooo:rsid="01552774" style:font-size-asian="10pt" style:font-size-complex="10pt"/>
    </style:style>
    <style:style style:name="T115" style:family="text">
      <style:text-properties fo:color="#2a00ff" loext:opacity="100%" style:font-name="Consolas" fo:font-size="10pt" officeooo:rsid="01530af7" style:font-size-asian="10pt" style:font-size-complex="10pt"/>
    </style:style>
    <style:style style:name="T116" style:family="text">
      <style:text-properties fo:color="#2a00ff" loext:opacity="100%" style:font-name="Consolas" fo:font-size="10pt" officeooo:rsid="02f6d787" style:font-size-asian="10pt" style:font-size-complex="10pt"/>
    </style:style>
    <style:style style:name="T117" style:family="text">
      <style:text-properties fo:color="#ff0000" loext:opacity="100%" officeooo:rsid="0323367e"/>
    </style:style>
    <style:style style:name="T118" style:family="text">
      <style:text-properties fo:color="#ff0000" loext:opacity="100%"/>
    </style:style>
    <style:style style:name="T119" style:family="text">
      <style:text-properties fo:color="#ff0000" loext:opacity="100%" officeooo:rsid="032313ae"/>
    </style:style>
    <style:style style:name="T120" style:family="text">
      <style:text-properties fo:color="#2a00ff" loext:opacity="100%" style:font-name="Consolas" fo:font-size="10pt" officeooo:rsid="031dcd47" style:font-size-asian="10pt" style:font-size-complex="10pt"/>
    </style:style>
    <style:style style:name="T121" style:family="text">
      <style:text-properties fo:color="#2a00ff" loext:opacity="100%" style:font-name="Consolas" fo:font-size="10pt" officeooo:rsid="03323497" style:font-size-asian="10pt" style:font-size-complex="10pt"/>
    </style:style>
    <style:style style:name="T122" style:family="text">
      <style:text-properties fo:color="#2a00ff" loext:opacity="100%" style:font-name="Consolas" fo:font-size="10pt" officeooo:rsid="0337e28e" style:font-size-asian="10pt" style:font-size-complex="10pt"/>
    </style:style>
    <style:style style:name="T123" style:family="text">
      <style:text-properties fo:color="#0000c0" loext:opacity="100%" style:font-name="Consolas1" fo:font-size="10pt" officeooo:rsid="032621c0" style:font-size-asian="10pt"/>
    </style:style>
    <style:style style:name="T124" style:family="text">
      <style:text-properties fo:color="#0000c0" loext:opacity="100%" style:font-name="Consolas1" fo:font-size="10pt" fo:background-color="transparent" loext:char-shading-value="0" style:font-size-asian="10pt"/>
    </style:style>
    <style:style style:name="T125" style:family="text">
      <style:text-properties fo:font-weight="bold" officeooo:rsid="025455a6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officeooo:rsid="02412e70" style:font-weight-asian="bold" style:font-weight-complex="bold"/>
    </style:style>
    <style:style style:name="T128" style:family="text">
      <style:text-properties officeooo:rsid="02157635"/>
    </style:style>
    <style:style style:name="T129" style:family="text">
      <style:text-properties officeooo:rsid="01552e56"/>
    </style:style>
    <style:style style:name="T130" style:family="text">
      <style:text-properties fo:color="#2a00ff" loext:opacity="100%" style:font-name="Consolas" fo:font-size="10pt" officeooo:rsid="01ee5f89" style:font-size-asian="10pt" style:font-size-complex="10pt"/>
    </style:style>
    <style:style style:name="T131" style:family="text">
      <style:text-properties fo:font-style="italic" officeooo:rsid="01ef5a5c" style:font-style-asian="italic" style:font-style-complex="italic"/>
    </style:style>
    <style:style style:name="T132" style:family="text">
      <style:text-properties officeooo:rsid="027c68ba"/>
    </style:style>
    <style:style style:name="T133" style:family="text">
      <style:text-properties officeooo:rsid="035a381f"/>
    </style:style>
    <style:style style:name="T134" style:family="text">
      <style:text-properties officeooo:rsid="035beef4"/>
    </style:style>
    <style:style style:name="T135" style:family="text">
      <style:text-properties officeooo:rsid="0267b823"/>
    </style:style>
    <style:style style:name="T136" style:family="text">
      <style:text-properties fo:color="#2a00ff" loext:opacity="100%" style:font-name="Consolas" fo:font-size="10pt" officeooo:rsid="02696b43" style:font-size-asian="10pt" style:font-size-complex="10pt"/>
    </style:style>
    <style:style style:name="T137" style:family="text">
      <style:text-properties fo:color="#2a00ff" loext:opacity="100%" style:font-name="Consolas" fo:font-size="10pt" officeooo:rsid="026b2b6b" style:font-size-asian="10pt" style:font-size-complex="10pt"/>
    </style:style>
    <style:style style:name="T138" style:family="text">
      <style:text-properties fo:color="#2a00ff" loext:opacity="100%" style:font-name="Consolas" fo:font-size="10pt" officeooo:rsid="02181b88" style:font-size-asian="10pt" style:font-size-complex="10pt"/>
    </style:style>
    <style:style style:name="T139" style:family="text">
      <style:text-properties fo:color="#2a00ff" loext:opacity="100%" style:font-name="Consolas" fo:font-size="10pt" officeooo:rsid="026b8c8d" style:font-size-asian="10pt" style:font-size-complex="10pt"/>
    </style:style>
    <style:style style:name="T140" style:family="text">
      <style:text-properties fo:font-style="italic" officeooo:rsid="026ba581" style:font-style-asian="italic" style:font-style-complex="italic"/>
    </style:style>
    <style:style style:name="T141" style:family="text">
      <style:text-properties fo:font-style="italic" officeooo:rsid="0213fd3b" style:font-style-asian="italic" style:font-style-complex="italic"/>
    </style:style>
    <style:style style:name="T142" style:family="text">
      <style:text-properties fo:font-style="italic" officeooo:rsid="021ce184" style:font-style-asian="italic" style:font-style-complex="italic"/>
    </style:style>
    <style:style style:name="T143" style:family="text">
      <style:text-properties fo:font-style="italic" officeooo:rsid="026ebc41" style:font-style-asian="italic" style:font-style-complex="italic"/>
    </style:style>
    <style:style style:name="T144" style:family="text">
      <style:text-properties fo:font-style="italic" officeooo:rsid="026d686f" style:font-style-asian="italic" style:font-style-complex="italic"/>
    </style:style>
    <style:style style:name="T145" style:family="text">
      <style:text-properties officeooo:rsid="03396741"/>
    </style:style>
    <style:style style:name="T146" style:family="text">
      <style:text-properties officeooo:rsid="033a07d1"/>
    </style:style>
    <style:style style:name="T147" style:family="text">
      <style:text-properties officeooo:rsid="0347fe71"/>
    </style:style>
    <style:style style:name="T148" style:family="text">
      <style:text-properties officeooo:rsid="02819b67"/>
    </style:style>
    <style:style style:name="T149" style:family="text">
      <style:text-properties officeooo:rsid="027de7c6"/>
    </style:style>
    <style:style style:name="T15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51" style:family="text">
      <style:text-properties officeooo:rsid="0287f70c"/>
    </style:style>
    <style:style style:name="T152" style:family="text">
      <style:text-properties fo:color="#2a00ff" loext:opacity="100%" style:font-name="Consolas" fo:font-size="10pt" fo:font-style="normal" style:text-underline-style="none" officeooo:rsid="01920ea7" style:font-size-asian="10pt" style:font-style-asian="normal" style:font-size-complex="10pt" style:font-style-complex="normal"/>
    </style:style>
    <style:style style:name="T153" style:family="text">
      <style:text-properties fo:color="#2a00ff" loext:opacity="100%" style:font-name="Consolas" fo:font-size="10pt" fo:font-style="normal" style:text-underline-style="none" officeooo:rsid="033babbb" style:font-size-asian="10pt" style:font-style-asian="normal" style:font-size-complex="10pt" style:font-style-complex="normal"/>
    </style:style>
    <style:style style:name="T154" style:family="text">
      <style:text-properties fo:color="#2a00ff" loext:opacity="100%" style:font-name="Consolas" fo:font-size="10pt" fo:font-style="normal" style:text-underline-style="none" officeooo:rsid="028641e7" style:font-size-asian="10pt" style:font-style-asian="normal" style:font-size-complex="10pt" style:font-style-complex="normal"/>
    </style:style>
    <style:style style:name="T155" style:family="text">
      <style:text-properties style:text-underline-style="solid" style:text-underline-width="auto" style:text-underline-color="font-color" officeooo:rsid="028d29d7"/>
    </style:style>
    <style:style style:name="T156" style:family="text">
      <style:text-properties officeooo:rsid="028d29d7"/>
    </style:style>
    <style:style style:name="T157" style:family="text">
      <style:text-properties officeooo:rsid="028e895b"/>
    </style:style>
    <style:style style:name="T158" style:family="text">
      <style:text-properties fo:color="#2a00ff" loext:opacity="100%" style:font-name="Consolas" fo:font-size="10pt" officeooo:rsid="033e32f2" style:font-size-asian="10pt" style:font-size-complex="10pt"/>
    </style:style>
    <style:style style:name="T159" style:family="text">
      <style:text-properties fo:color="#2a00ff" loext:opacity="100%" style:font-name="Consolas" fo:font-size="10pt" officeooo:rsid="02908847" style:font-size-asian="10pt" style:font-size-complex="10pt"/>
    </style:style>
    <style:style style:name="T160" style:family="text">
      <style:text-properties fo:color="#2a00ff" loext:opacity="100%" style:font-name="Consolas" fo:font-size="10pt" fo:font-style="normal" officeooo:rsid="028641e7" style:font-size-asian="10pt" style:font-style-asian="normal" style:font-size-complex="10pt" style:font-style-complex="normal"/>
    </style:style>
    <style:style style:name="T161" style:family="text">
      <style:text-properties fo:color="#2a00ff" loext:opacity="100%" style:font-name="Consolas" fo:font-size="10pt" fo:font-style="normal" officeooo:rsid="0290a1cc" style:font-size-asian="10pt" style:font-style-asian="normal" style:font-size-complex="10pt" style:font-style-complex="normal"/>
    </style:style>
    <style:style style:name="T162" style:family="text">
      <style:text-properties officeooo:rsid="0293bbe9"/>
    </style:style>
    <style:style style:name="T163" style:family="text">
      <style:text-properties officeooo:rsid="023b91d9"/>
    </style:style>
    <style:style style:name="T164" style:family="text">
      <style:text-properties officeooo:rsid="024f1e2f"/>
    </style:style>
    <style:style style:name="T165" style:family="text">
      <style:text-properties style:font-name="Consolas" fo:font-size="10pt" officeooo:rsid="02ed8749" style:font-size-asian="10pt" style:font-size-complex="10pt"/>
    </style:style>
    <style:style style:name="T166" style:family="text">
      <style:text-properties officeooo:rsid="02dde310"/>
    </style:style>
    <style:style style:name="T167" style:family="text">
      <style:text-properties officeooo:rsid="02f1a729"/>
    </style:style>
    <style:style style:name="T168" style:family="text">
      <style:text-properties fo:color="#ff0000" loext:opacity="100%" fo:font-weight="bold" officeooo:rsid="025722c2" style:font-weight-asian="bold" style:font-weight-complex="bold"/>
    </style:style>
    <style:style style:name="T169" style:family="text">
      <style:text-properties fo:color="#ff0000" loext:opacity="100%" fo:font-weight="bold" style:font-weight-asian="bold" style:font-weight-complex="bold"/>
    </style:style>
    <style:style style:name="T170" style:family="text">
      <style:text-properties fo:color="#ff0000" loext:opacity="100%" fo:font-weight="bold" officeooo:rsid="00b91b01" style:font-weight-asian="bold" style:font-weight-complex="bold"/>
    </style:style>
    <style:style style:name="T171" style:family="text">
      <style:text-properties officeooo:rsid="030417fe"/>
    </style:style>
    <style:style style:name="T172" style:family="text">
      <style:text-properties officeooo:rsid="029e0a49"/>
    </style:style>
    <style:style style:name="T173" style:family="text">
      <style:text-properties officeooo:rsid="02a52bff"/>
    </style:style>
    <style:style style:name="T174" style:family="text">
      <style:text-properties officeooo:rsid="029b2a6d"/>
    </style:style>
    <style:style style:name="T175" style:family="text">
      <style:text-properties fo:color="#2a00ff" loext:opacity="100%" style:font-name="Consolas" fo:font-size="10pt" officeooo:rsid="03426c35" style:font-size-asian="10pt" style:font-size-complex="10pt"/>
    </style:style>
    <style:style style:name="T176" style:family="text">
      <style:text-properties fo:color="#2a00ff" loext:opacity="100%" style:font-name="Consolas" fo:font-size="10pt" officeooo:rsid="033f9438" style:font-size-asian="10pt" style:font-size-complex="10pt"/>
    </style:style>
    <style:style style:name="T177" style:family="text">
      <style:text-properties fo:color="#2a00ff" loext:opacity="100%" style:font-name="Consolas1" fo:font-size="10pt" officeooo:rsid="029b2a6d" fo:background-color="transparent" loext:char-shading-value="0" style:font-size-asian="10pt" style:font-size-complex="10pt"/>
    </style:style>
    <style:style style:name="T178" style:family="text">
      <style:text-properties fo:font-style="italic" officeooo:rsid="02ca9f2c" style:font-style-asian="italic" style:font-style-complex="italic"/>
    </style:style>
    <style:style style:name="T179" style:family="text">
      <style:text-properties fo:font-style="italic" officeooo:rsid="029c4a88" style:font-style-asian="italic" style:font-style-complex="italic"/>
    </style:style>
    <style:style style:name="T180" style:family="text">
      <style:text-properties fo:font-style="italic" officeooo:rsid="029cf023" style:font-style-asian="italic" style:font-style-complex="italic"/>
    </style:style>
    <style:style style:name="T181" style:family="text">
      <style:text-properties style:text-underline-style="solid" style:text-underline-width="auto" style:text-underline-color="font-color" officeooo:rsid="02be519e"/>
    </style:style>
    <style:style style:name="T182" style:family="text">
      <style:text-properties style:text-underline-style="solid" style:text-underline-width="auto" style:text-underline-color="font-color" officeooo:rsid="02bf4abb"/>
    </style:style>
    <style:style style:name="T183" style:family="text">
      <style:text-properties style:text-underline-style="solid" style:text-underline-width="auto" style:text-underline-color="font-color" officeooo:rsid="02c5814d"/>
    </style:style>
    <style:style style:name="T184" style:family="text">
      <style:text-properties style:text-underline-style="solid" style:text-underline-width="auto" style:text-underline-color="font-color" officeooo:rsid="02d377d5"/>
    </style:style>
    <style:style style:name="T185" style:family="text">
      <style:text-properties officeooo:rsid="02d377d5"/>
    </style:style>
    <style:style style:name="T186" style:family="text">
      <style:text-properties fo:color="#2a00ff" loext:opacity="100%" style:font-name="Consolas" fo:font-size="10pt" officeooo:rsid="0343e6ff" style:font-size-asian="10pt" style:font-size-complex="10pt"/>
    </style:style>
    <style:style style:name="T187" style:family="text">
      <style:text-properties fo:color="#2a00ff" loext:opacity="100%" style:font-name="Consolas" fo:font-size="10pt" officeooo:rsid="02d4dd1a" style:font-size-asian="10pt" style:font-size-complex="10pt"/>
    </style:style>
    <style:style style:name="T188" style:family="text">
      <style:text-properties fo:color="#2a00ff" loext:opacity="100%" style:font-name="Consolas" fo:font-size="10pt" fo:font-style="italic" officeooo:rsid="028641e7" style:font-size-asian="10pt" style:font-style-asian="italic" style:font-size-complex="10pt" style:font-style-complex="italic"/>
    </style:style>
    <style:style style:name="T189" style:family="text">
      <style:text-properties fo:color="#2a00ff" loext:opacity="100%" style:font-name="Consolas" fo:font-size="10pt" fo:font-style="italic" officeooo:rsid="02d5bb57" style:font-size-asian="10pt" style:font-style-asian="italic" style:font-size-complex="10pt" style:font-style-complex="italic"/>
    </style:style>
    <style:style style:name="T190" style:family="text">
      <style:text-properties fo:color="#2a00ff" loext:opacity="100%" style:font-name="Consolas" fo:font-size="10pt" officeooo:rsid="02c6df3c" style:font-size-asian="10pt" style:font-size-complex="10pt"/>
    </style:style>
    <style:style style:name="T191" style:family="text">
      <style:text-properties fo:color="#2a00ff" loext:opacity="100%" style:font-name="Consolas" fo:font-size="10pt" fo:font-style="italic" officeooo:rsid="02d10506" style:font-size-asian="10pt" style:font-style-asian="italic" style:font-size-complex="10pt" style:font-style-complex="italic"/>
    </style:style>
    <style:style style:name="T192" style:family="text">
      <style:text-properties officeooo:rsid="0348b566"/>
    </style:style>
    <style:style style:name="T193" style:family="text">
      <style:text-properties officeooo:rsid="0349b5c9"/>
    </style:style>
    <style:style style:name="T194" style:family="text">
      <style:text-properties style:font-name="Consolas" fo:font-size="10pt" officeooo:rsid="02f6b5b0" style:font-size-asian="10pt" style:font-size-complex="10pt"/>
    </style:style>
    <style:style style:name="T195" style:family="text">
      <style:text-properties fo:font-weight="bold" officeooo:rsid="01092d57" style:font-weight-asian="bold" style:font-weight-complex="bold"/>
    </style:style>
    <style:style style:name="T196" style:family="text">
      <style:text-properties fo:font-weight="bold" officeooo:rsid="00656421" style:font-weight-asian="bold" style:font-weight-complex="bold"/>
    </style:style>
    <style:style style:name="T197" style:family="text">
      <style:text-properties officeooo:rsid="00656421"/>
    </style:style>
    <style:style style:name="T198" style:family="text">
      <style:text-properties officeooo:rsid="00685c9a"/>
    </style:style>
    <style:style style:name="T199" style:family="text">
      <style:text-properties officeooo:rsid="0069008d"/>
    </style:style>
    <style:style style:name="T200" style:family="text">
      <style:text-properties officeooo:rsid="00c323ec"/>
    </style:style>
    <style:style style:name="T201" style:family="text">
      <style:text-properties style:font-name="Consolas" fo:font-size="10pt" officeooo:rsid="01e42033" style:font-size-asian="10pt" style:font-size-complex="10pt"/>
    </style:style>
    <style:style style:name="T202" style:family="text">
      <style:text-properties fo:color="#2a00ff" loext:opacity="100%" style:font-name="Consolas" fo:font-size="10pt" officeooo:rsid="01c4e65f" style:font-size-asian="10pt" style:font-size-complex="10pt"/>
    </style:style>
    <style:style style:name="T203" style:family="text">
      <style:text-properties fo:color="#2a00ff" loext:opacity="100%" style:font-name="Consolas" fo:font-size="10pt" officeooo:rsid="01cf8149" style:font-size-asian="10pt" style:font-size-complex="10pt"/>
    </style:style>
    <style:style style:name="T204" style:family="text">
      <style:text-properties officeooo:rsid="00667589"/>
    </style:style>
    <style:style style:name="T205" style:family="text">
      <style:text-properties officeooo:rsid="00c4f081"/>
    </style:style>
    <style:style style:name="T206" style:family="text">
      <style:text-properties officeooo:rsid="00c6db47"/>
    </style:style>
    <style:style style:name="T207" style:family="text">
      <style:text-properties officeooo:rsid="00c8ab58"/>
    </style:style>
    <style:style style:name="T208" style:family="text">
      <style:text-properties officeooo:rsid="00905b3c"/>
    </style:style>
    <style:style style:name="T209" style:family="text">
      <style:text-properties officeooo:rsid="00918401"/>
    </style:style>
    <style:style style:name="T210" style:family="text">
      <style:text-properties officeooo:rsid="0065c6ee"/>
    </style:style>
    <style:style style:name="T211" style:family="text">
      <style:text-properties officeooo:rsid="005c30ff"/>
    </style:style>
    <style:style style:name="T212" style:family="text">
      <style:text-properties officeooo:rsid="006230c6"/>
    </style:style>
    <style:style style:name="T213" style:family="text">
      <style:text-properties officeooo:rsid="00625d16"/>
    </style:style>
    <style:style style:name="T214" style:family="text">
      <style:text-properties officeooo:rsid="005db891"/>
    </style:style>
    <style:style style:name="T215" style:family="text">
      <style:text-properties officeooo:rsid="00644209"/>
    </style:style>
    <style:style style:name="T216" style:family="text">
      <style:text-properties fo:color="#2a00ff" loext:opacity="100%" style:font-name="Consolas" fo:font-size="10pt" officeooo:rsid="01d0f895" style:font-size-asian="10pt" style:font-size-complex="10pt"/>
    </style:style>
    <style:style style:name="T217" style:family="text">
      <style:text-properties officeooo:rsid="00ca9fe8"/>
    </style:style>
    <style:style style:name="T218" style:family="text">
      <style:text-properties officeooo:rsid="00adec37"/>
    </style:style>
    <style:style style:name="T219" style:family="text">
      <style:text-properties officeooo:rsid="00896daf"/>
    </style:style>
    <style:style style:name="T220" style:family="text">
      <style:text-properties officeooo:rsid="00980bb0"/>
    </style:style>
    <style:style style:name="T221" style:family="text">
      <style:text-properties officeooo:rsid="00ee9002"/>
    </style:style>
    <style:style style:name="T222" style:family="text">
      <style:text-properties officeooo:rsid="00ef74a1"/>
    </style:style>
    <style:style style:name="T223" style:family="text">
      <style:text-properties officeooo:rsid="00d87782"/>
    </style:style>
    <style:style style:name="T224" style:family="text">
      <style:text-properties officeooo:rsid="00d21149"/>
    </style:style>
    <style:style style:name="T225" style:family="text">
      <style:text-properties officeooo:rsid="00d31599"/>
    </style:style>
    <style:style style:name="T226" style:family="text">
      <style:text-properties officeooo:rsid="00707fe5"/>
    </style:style>
    <style:style style:name="T227" style:family="text">
      <style:text-properties officeooo:rsid="00db498a"/>
    </style:style>
    <style:style style:name="T228" style:family="text">
      <style:text-properties officeooo:rsid="00d41464"/>
    </style:style>
    <style:style style:name="T229" style:family="text">
      <style:text-properties officeooo:rsid="00cde92c"/>
    </style:style>
    <style:style style:name="T230" style:family="text">
      <style:text-properties officeooo:rsid="00cc1875"/>
    </style:style>
    <style:style style:name="T231" style:family="text">
      <style:text-properties officeooo:rsid="00d4c265"/>
    </style:style>
    <style:style style:name="T232" style:family="text">
      <style:text-properties officeooo:rsid="00cf941b"/>
    </style:style>
    <style:style style:name="T233" style:family="text">
      <style:text-properties officeooo:rsid="00d57112"/>
    </style:style>
    <style:style style:name="T234" style:family="text">
      <style:text-properties officeooo:rsid="00d63f90"/>
    </style:style>
    <style:style style:name="T235" style:family="text">
      <style:text-properties officeooo:rsid="007198c7"/>
    </style:style>
    <style:style style:name="T236" style:family="text">
      <style:text-properties officeooo:rsid="007459aa"/>
    </style:style>
    <style:style style:name="T237" style:family="text">
      <style:text-properties officeooo:rsid="0075740a"/>
    </style:style>
    <style:style style:name="T238" style:family="text">
      <style:text-properties officeooo:rsid="0076bc54"/>
    </style:style>
    <style:style style:name="T239" style:family="text">
      <style:text-properties officeooo:rsid="0078fece"/>
    </style:style>
    <style:style style:name="T240" style:family="text">
      <style:text-properties officeooo:rsid="00795655"/>
    </style:style>
    <style:style style:name="T241" style:family="text">
      <style:text-properties officeooo:rsid="007c8938"/>
    </style:style>
    <style:style style:name="T242" style:family="text">
      <style:text-properties officeooo:rsid="007b0300"/>
    </style:style>
    <style:style style:name="T243" style:family="text">
      <style:text-properties officeooo:rsid="007dcc24"/>
    </style:style>
    <style:style style:name="T244" style:family="text">
      <style:text-properties officeooo:rsid="007f774f"/>
    </style:style>
    <style:style style:name="T245" style:family="text">
      <style:text-properties fo:color="#2a00ff" loext:opacity="100%" style:font-name="Consolas" fo:font-size="10pt" officeooo:rsid="01d18ffe" style:font-size-asian="10pt" style:font-size-complex="10pt"/>
    </style:style>
    <style:style style:name="T246" style:family="text">
      <style:text-properties officeooo:rsid="00d76d4b"/>
    </style:style>
    <style:style style:name="T247" style:family="text">
      <style:text-properties officeooo:rsid="00a628f4"/>
    </style:style>
    <style:style style:name="T248" style:family="text">
      <style:text-properties officeooo:rsid="008bdb04"/>
    </style:style>
    <style:style style:name="T249" style:family="text">
      <style:text-properties officeooo:rsid="00da176e"/>
    </style:style>
    <style:style style:name="T250" style:family="text">
      <style:text-properties officeooo:rsid="00e9caa1"/>
    </style:style>
    <style:style style:name="T251" style:family="text">
      <style:text-properties officeooo:rsid="00df6937"/>
    </style:style>
    <style:style style:name="T252" style:family="text">
      <style:text-properties officeooo:rsid="00e13f09"/>
    </style:style>
    <style:style style:name="T253" style:family="text">
      <style:text-properties officeooo:rsid="00e186b0"/>
    </style:style>
    <style:style style:name="T254" style:family="text">
      <style:text-properties officeooo:rsid="00e4707f"/>
    </style:style>
    <style:style style:name="T255" style:family="text">
      <style:text-properties officeooo:rsid="00e31dd1"/>
    </style:style>
    <style:style style:name="T256" style:family="text">
      <style:text-properties officeooo:rsid="00e4472a"/>
    </style:style>
    <style:style style:name="T257" style:family="text">
      <style:text-properties officeooo:rsid="00e5b09d"/>
    </style:style>
    <style:style style:name="T258" style:family="text">
      <style:text-properties officeooo:rsid="01cbf7e6"/>
    </style:style>
    <style:style style:name="T259" style:family="text">
      <style:text-properties officeooo:rsid="00e75ea0"/>
    </style:style>
    <style:style style:name="T260" style:family="text">
      <style:text-properties officeooo:rsid="00e7e729"/>
    </style:style>
    <style:style style:name="T261" style:family="text">
      <style:text-properties fo:color="#2a00ff" loext:opacity="100%" style:font-name="Consolas" fo:font-size="10pt" officeooo:rsid="01d24f81" style:font-size-asian="10pt" style:font-size-complex="10pt"/>
    </style:style>
    <style:style style:name="T262" style:family="text">
      <style:text-properties fo:font-weight="bold" officeooo:rsid="00e9784a" style:font-weight-asian="bold" style:font-weight-complex="bold"/>
    </style:style>
    <style:style style:name="T263" style:family="text">
      <style:text-properties fo:color="#2a00ff" loext:opacity="100%" style:font-name="Consolas" fo:font-size="10pt" officeooo:rsid="01d349c9" style:font-size-asian="10pt" style:font-size-complex="10pt"/>
    </style:style>
    <style:style style:name="T264" style:family="text">
      <style:text-properties officeooo:rsid="01014473"/>
    </style:style>
    <style:style style:name="T265" style:family="text">
      <style:text-properties officeooo:rsid="01babce6"/>
    </style:style>
    <style:style style:name="T266" style:family="text">
      <style:text-properties officeooo:rsid="01a29867"/>
    </style:style>
    <style:style style:name="T267" style:family="text">
      <style:text-properties officeooo:rsid="01a67449"/>
    </style:style>
    <style:style style:name="T268" style:family="text">
      <style:text-properties officeooo:rsid="0231453f"/>
    </style:style>
    <style:style style:name="T269" style:family="text">
      <style:text-properties officeooo:rsid="01dec801"/>
    </style:style>
    <style:style style:name="T270" style:family="text">
      <style:text-properties officeooo:rsid="01e076db"/>
    </style:style>
    <style:style style:name="T271" style:family="text">
      <style:text-properties officeooo:rsid="01e77e2c"/>
    </style:style>
    <style:style style:name="T272" style:family="text">
      <style:text-properties fo:font-weight="normal" style:font-weight-asian="normal" style:font-weight-complex="normal"/>
    </style:style>
    <style:style style:name="T273" style:family="text">
      <style:text-properties fo:font-weight="normal" officeooo:rsid="030151c9" style:font-weight-asian="normal" style:font-weight-complex="normal"/>
    </style:style>
    <style:style style:name="T27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5" style:family="text">
      <style:text-properties officeooo:rsid="012d65b9"/>
    </style:style>
    <style:style style:name="T276" style:family="text">
      <style:text-properties officeooo:rsid="01202ff1"/>
    </style:style>
    <style:style style:name="T277" style:family="text">
      <style:text-properties officeooo:rsid="013174e0"/>
    </style:style>
    <style:style style:name="T278" style:family="text">
      <style:text-properties officeooo:rsid="01a10ebc"/>
    </style:style>
    <style:style style:name="T279" style:family="text">
      <style:text-properties officeooo:rsid="012f89c0"/>
    </style:style>
    <style:style style:name="T280" style:family="text">
      <style:text-properties officeooo:rsid="019f852c"/>
    </style:style>
    <style:style style:name="T281" style:family="text">
      <style:text-properties officeooo:rsid="01215b4c"/>
    </style:style>
    <style:style style:name="T282" style:family="text">
      <style:text-properties fo:font-weight="bold" officeooo:rsid="0122223c" style:font-weight-asian="bold" style:font-weight-complex="bold"/>
    </style:style>
    <style:style style:name="T283" style:family="text">
      <style:text-properties fo:font-weight="bold" officeooo:rsid="0132c2df" style:font-weight-asian="bold" style:font-weight-complex="bold"/>
    </style:style>
    <style:style style:name="T284" style:family="text">
      <style:text-properties fo:font-weight="bold" officeooo:rsid="01349c9b" style:font-weight-asian="bold" style:font-weight-complex="bold"/>
    </style:style>
    <style:style style:name="T285" style:family="text">
      <style:text-properties officeooo:rsid="01a98a96"/>
    </style:style>
    <style:style style:name="T286" style:family="text">
      <style:text-properties officeooo:rsid="01bc5401"/>
    </style:style>
    <style:style style:name="T287" style:family="text">
      <style:text-properties officeooo:rsid="01bf3b8e"/>
    </style:style>
    <style:style style:name="T288" style:family="text">
      <style:text-properties officeooo:rsid="01c138de"/>
    </style:style>
    <style:style style:name="T289" style:family="text">
      <style:text-properties officeooo:rsid="01c09ad9"/>
    </style:style>
    <style:style style:name="T290" style:family="text">
      <style:text-properties fo:font-weight="bold" officeooo:rsid="02068047" style:font-weight-asian="bold" style:font-weight-complex="bold"/>
    </style:style>
    <style:style style:name="T291" style:family="text">
      <style:text-properties fo:font-weight="normal" officeooo:rsid="02e550e6" style:font-weight-asian="normal" style:font-weight-complex="normal"/>
    </style:style>
    <style:style style:name="T292" style:family="text">
      <style:text-properties officeooo:rsid="01e7a39b"/>
    </style:style>
    <style:style style:name="T293" style:family="text">
      <style:text-properties officeooo:rsid="01e59e37"/>
    </style:style>
    <style:style style:name="T294" style:family="text">
      <style:text-properties officeooo:rsid="013a8104"/>
    </style:style>
    <style:style style:name="T295" style:family="text">
      <style:text-properties officeooo:rsid="013b9d73"/>
    </style:style>
    <style:style style:name="T296" style:family="text">
      <style:text-properties fo:font-weight="bold" officeooo:rsid="00f065d2" style:font-weight-asian="bold" style:font-weight-complex="bold"/>
    </style:style>
    <style:style style:name="T297" style:family="text">
      <style:text-properties officeooo:rsid="00f065d2"/>
    </style:style>
    <style:style style:name="T298" style:family="text">
      <style:text-properties officeooo:rsid="010a8b7c"/>
    </style:style>
    <style:style style:name="T299" style:family="text">
      <style:text-properties officeooo:rsid="01c968fd"/>
    </style:style>
    <style:style style:name="T300" style:family="text">
      <style:text-properties officeooo:rsid="00a7fd26"/>
    </style:style>
    <style:style style:name="T301" style:family="text">
      <style:text-properties fo:font-weight="bold" officeooo:rsid="00fdcf21" style:font-weight-asian="bold" style:font-weight-complex="bold"/>
    </style:style>
    <style:style style:name="T302" style:family="text">
      <style:text-properties officeooo:rsid="0100e377"/>
    </style:style>
    <style:style style:name="T303" style:family="text">
      <style:text-properties officeooo:rsid="00f8dfd2"/>
    </style:style>
    <style:style style:name="T304" style:family="text">
      <style:text-properties fo:font-weight="bold" officeooo:rsid="0103aeb2" style:font-weight-asian="bold" style:font-weight-complex="bold"/>
    </style:style>
    <style:style style:name="T305" style:family="text">
      <style:text-properties fo:font-weight="bold" officeooo:rsid="00f6cd45" style:font-weight-asian="bold" style:font-weight-complex="bold"/>
    </style:style>
    <style:style style:name="T306" style:family="text">
      <style:text-properties fo:font-weight="bold" officeooo:rsid="00f789c8" style:font-weight-asian="bold" style:font-weight-complex="bold"/>
    </style:style>
    <style:style style:name="T307" style:family="text">
      <style:text-properties fo:font-weight="normal" officeooo:rsid="00f6cd45" style:font-weight-asian="normal" style:font-weight-complex="normal"/>
    </style:style>
    <style:style style:name="T308" style:family="text">
      <style:text-properties fo:font-weight="normal" officeooo:rsid="00656421" style:font-weight-asian="normal" style:font-weight-complex="normal"/>
    </style:style>
    <style:style style:name="T309" style:family="text">
      <style:text-properties fo:font-weight="normal" officeooo:rsid="00685c9a" style:font-weight-asian="normal" style:font-weight-complex="normal"/>
    </style:style>
    <style:style style:name="T310" style:family="text">
      <style:text-properties fo:font-weight="normal" officeooo:rsid="0100e377" style:font-weight-asian="normal" style:font-weight-complex="normal"/>
    </style:style>
    <style:style style:name="T311" style:family="text">
      <style:text-properties fo:font-weight="normal" officeooo:rsid="00f8dfd2" style:font-weight-asian="normal" style:font-weight-complex="normal"/>
    </style:style>
    <style:style style:name="T312" style:family="text">
      <style:text-properties fo:font-weight="normal" officeooo:rsid="0069008d" style:font-weight-asian="normal" style:font-weight-complex="normal"/>
    </style:style>
    <style:style style:name="T313" style:family="text">
      <style:text-properties fo:font-weight="normal" officeooo:rsid="00c323ec" style:font-weight-asian="normal" style:font-weight-complex="normal"/>
    </style:style>
    <style:style style:name="T314" style:family="text">
      <style:text-properties fo:font-weight="bold" officeooo:rsid="010427ba" style:font-weight-asian="bold" style:font-weight-complex="bold"/>
    </style:style>
    <style:style style:name="T315" style:family="text">
      <style:text-properties officeooo:rsid="010e20c5"/>
    </style:style>
    <style:style style:name="T316" style:family="text">
      <style:text-properties officeooo:rsid="010caa3a"/>
    </style:style>
    <style:style style:name="T317" style:family="text">
      <style:text-properties officeooo:rsid="011162d9"/>
    </style:style>
    <style:style style:name="T318" style:family="text">
      <style:text-properties officeooo:rsid="010f7034"/>
    </style:style>
    <style:style style:name="T319" style:family="text">
      <style:text-properties officeooo:rsid="012966a5"/>
    </style:style>
    <style:style style:name="T320" style:family="text">
      <style:text-properties officeooo:rsid="01277bff"/>
    </style:style>
    <style:style style:name="T321" style:family="text">
      <style:text-properties officeooo:rsid="012b17d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NATIS 1.0</text:p>
      <text:p text:style-name="P1"/>
      <text:p text:style-name="Heading_20_1">Fonctionnalités <text:span text:style-name="T1">1.0</text:span></text:p>
      <text:p text:style-name="Text_20_body"/>
      <text:h text:style-name="P2" text:outline-level="3">Gestion des données</text:h>
      <text:p text:style-name="Heading_20_3">Banque</text:p>
      <text:p text:style-name="Standard"><text:span text:style-name="T2">Afficher</text:span> <text:span text:style-name="T2">la</text:span> liste des banques enregistrées.</text:p>
      <text:p text:style-name="P3">Ajout d’une nouvelle banque : saisie du nom<text:span text:style-name="T3"> </text:span><text:span text:style-name="T4">(obligatoire)</text:span> et du libellé</text:p>
      <text:p text:style-name="P3">Modification d’une banque : modification du nom et/ou du libellé</text:p>
      <text:p text:style-name="P3">Suppression d’une banque</text:p>
      <text:p text:style-name="P3"/>
      <text:p text:style-name="P4"/>
      <text:p text:style-name="P5">BanqueController</text:p>
      <text:p text:style-name="P6">GET<text:tab/><text:tab/>/monatis/references/banque/all</text:p>
      <text:p text:style-name="P7">GET<text:tab/><text:tab/>/monatis/references/banque/<text:span text:style-name="T5">get/{nom}</text:span></text:p>
      <text:p text:style-name="P8"><text:span text:style-name="T6">POST<text:tab/><text:tab/></text:span>/monatis/references/banque/<text:span text:style-name="T7">new</text:span></text:p>
      <text:p text:style-name="P9"><text:span text:style-name="T6">P</text:span><text:span text:style-name="T8">UT</text:span><text:span text:style-name="T6"><text:tab/><text:tab/></text:span>/monatis/references/banque/<text:span text:style-name="T9">mod/{nom}</text:span></text:p>
      <text:p text:style-name="P10">DELETE<text:tab/><text:tab/>/monatis/references/banque/<text:span text:style-name="T10">del</text:span><text:span text:style-name="T9">/{nom}</text:span></text:p>
      <text:p text:style-name="Standard"/>
      <text:p text:style-name="Standard"/>
      <text:p text:style-name="Heading_20_3">Titulaire</text:p>
      <text:p text:style-name="Standard">Idem</text:p>
      <text:p text:style-name="Standard"/>
      <text:p text:style-name="P11"><text:span text:style-name="T11">Titulaire</text:span><text:span text:style-name="T12">Controller</text:span></text:p>
      <text:p text:style-name="P12">GET<text:tab/><text:tab/>/monatis/references/<text:span text:style-name="T13">titulaire</text:span>/all</text:p>
      <text:p text:style-name="P12">GET<text:tab/><text:tab/>/monatis/references/<text:span text:style-name="T13">titulaire</text:span>/<text:span text:style-name="T5">get/{nom}</text:span></text:p>
      <text:p text:style-name="P12"><text:span text:style-name="T6">POST<text:tab/><text:tab/></text:span>/monatis/references/<text:span text:style-name="T14">titulaire</text:span>/<text:span text:style-name="T7">new</text:span></text:p>
      <text:p text:style-name="P12"><text:span text:style-name="T6">P</text:span><text:span text:style-name="T8">UT</text:span><text:span text:style-name="T6"><text:tab/><text:tab/></text:span>/monatis/references/<text:span text:style-name="T14">titulaire</text:span>/<text:span text:style-name="T9">mod/{nom}</text:span></text:p>
      <text:p text:style-name="P13">DELETE<text:tab/><text:tab/>/monatis/references/<text:span text:style-name="T14">titulaire</text:span>/<text:span text:style-name="T10">del</text:span><text:span text:style-name="T9">/{nom}</text:span></text:p>
      <text:p text:style-name="P14"/>
      <text:p text:style-name="Heading_20_3">Bénéficiaire</text:p>
      <text:p text:style-name="Standard">Idem</text:p>
      <text:p text:style-name="Standard"/>
      <text:p text:style-name="P15"><text:span text:style-name="T15">Beneficiaire</text:span><text:span text:style-name="T12">Controller</text:span></text:p>
      <text:p text:style-name="P16">GET<text:tab/><text:tab/>/monatis/references/<text:span text:style-name="T16">beneficiaire</text:span>/all</text:p>
      <text:p text:style-name="P17">GET<text:tab/><text:tab/>/monatis/references/<text:span text:style-name="T16">beneficiaire</text:span>/<text:span text:style-name="T5">get/{nom}</text:span></text:p>
      <text:p text:style-name="P17"><text:span text:style-name="T6">POST<text:tab/><text:tab/></text:span>/monatis/references/<text:span text:style-name="T16">beneficiaire</text:span>/<text:span text:style-name="T7">new</text:span></text:p>
      <text:p text:style-name="P17"><text:span text:style-name="T6">P</text:span><text:span text:style-name="T8">UT</text:span><text:span text:style-name="T6"><text:tab/><text:tab/></text:span>/monatis/references/<text:span text:style-name="T16">beneficiaire</text:span>/<text:span text:style-name="T9">mod/{nom}</text:span></text:p>
      <text:p text:style-name="P18">DELETE<text:tab/><text:tab/>/monatis/references/<text:span text:style-name="T16">beneficiaire</text:span>/<text:span text:style-name="T10">del</text:span><text:span text:style-name="T9">/{nom}</text:span></text:p>
      <text:p text:style-name="P19"/>
      <text:p text:style-name="P14"/>
      <text:p text:style-name="P14"/>
      <text:p text:style-name="P14"><text:soft-page-break/></text:p>
      <text:p text:style-name="Heading_20_3">Catégorie et sous catégorie</text:p>
      <text:p text:style-name="Standard">Afficher la liste des catégories</text:p>
      <text:p text:style-name="P3">Ajout d’une nouvelle catégorie : saisie du nom <text:span text:style-name="T3"><text:s/></text:span><text:span text:style-name="T4">(obligatoire) </text:span>et du libellé</text:p>
      <text:p text:style-name="P3">Modification d’une catégorie : modification du nom et/ou du libellé</text:p>
      <text:p text:style-name="P3"><text:span text:style-name="T17">Sous-catégories : p</text:span><text:span text:style-name="T18">our une catégorie, a</text:span>ffichage de la liste des sous-catégories</text:p>
      <text:p text:style-name="P20">Ajout d’une nouvelle sous catégorie : saisie du nom <text:span text:style-name="T19">(obligatoire)</text:span> et du libellé</text:p>
      <text:p text:style-name="P20">Modification d’une sous-catégorie <text:span text:style-name="T1">: modification du nom </text:span><text:span text:style-name="T20">et/ou</text:span><text:span text:style-name="T1"> du libellé</text:span></text:p>
      <text:p text:style-name="P20"><text:span text:style-name="T21">Transfert d’une sous-catégorie : la changer de catégorie. </text:span><text:span text:style-name="T22">Ré-affichage à gérer.</text:span></text:p>
      <text:p text:style-name="P20">Suppression d’une sous-catégorie</text:p>
      <text:p text:style-name="P20">Fermeture de la liste des sous-catégories</text:p>
      <text:p text:style-name="P21">Suppression d’une catégorie</text:p>
      <text:p text:style-name="P22"/>
      <text:p text:style-name="P23"><text:span text:style-name="T23">Categorie</text:span><text:span text:style-name="T12">Controller</text:span></text:p>
      <text:p text:style-name="P24">GET<text:tab/><text:tab/>/monatis/references/<text:span text:style-name="T24">categorie</text:span>/all</text:p>
      <text:p text:style-name="P25">GET<text:tab/><text:tab/>/monatis/references/<text:span text:style-name="T24">categorie</text:span>/<text:span text:style-name="T5">get/{nom}</text:span></text:p>
      <text:p text:style-name="P25"><text:span text:style-name="T6">POST<text:tab/><text:tab/></text:span>/monatis/references/<text:span text:style-name="T24">categorie</text:span>/<text:span text:style-name="T7">new</text:span></text:p>
      <text:p text:style-name="P25"><text:span text:style-name="T6">P</text:span><text:span text:style-name="T8">UT</text:span><text:span text:style-name="T6"><text:tab/><text:tab/></text:span>/monatis/references/<text:span text:style-name="T24">categorie</text:span>/<text:span text:style-name="T9">mod/{nom}</text:span></text:p>
      <text:p text:style-name="P26">DELETE<text:tab/><text:tab/>/monatis/references/<text:span text:style-name="T24">categorie</text:span>/<text:span text:style-name="T10">del</text:span><text:span text:style-name="T9">/{nom}</text:span></text:p>
      <text:p text:style-name="P26"/>
      <text:p text:style-name="P27">Les catégories contiennent une liste de sous-catégories <text:span text:style-name="T25">qui peut être vide.</text:span></text:p>
      <text:p text:style-name="P28"/>
      <text:p text:style-name="P29"/>
      <text:p text:style-name="P30"><text:span text:style-name="T26">Sous</text:span><text:span text:style-name="T23">Categorie</text:span><text:span text:style-name="T12">Controller</text:span></text:p>
      <text:p text:style-name="P6">GET<text:tab/><text:tab/>/monatis/references/souscategorie/all</text:p>
      <text:p text:style-name="P31">GET<text:tab/><text:tab/>/monatis/references/souscategorie/<text:span text:style-name="T5">get/{nom}</text:span></text:p>
      <text:p text:style-name="P31"><text:span text:style-name="T6">POST<text:tab/><text:tab/></text:span>/monatis/references/souscategorie/<text:span text:style-name="T7">new</text:span></text:p>
      <text:p text:style-name="P31"><text:span text:style-name="T6">P</text:span><text:span text:style-name="T8">UT</text:span><text:span text:style-name="T6"><text:tab/><text:tab/></text:span>/monatis/references/souscategorie/<text:span text:style-name="T9">mod/{nom}</text:span></text:p>
      <text:p text:style-name="P32">DELETE<text:tab/><text:tab/>/monatis/references/souscategorie/<text:span text:style-name="T10">del</text:span><text:span text:style-name="T9">/{nom}</text:span></text:p>
      <text:p text:style-name="P33"/>
      <text:p text:style-name="P34">Les <text:span text:style-name="T27">sous-</text:span>catégories contiennent <text:span text:style-name="T27">obligatoirement la catégorie à laquelle elles appartiennent</text:span><text:span text:style-name="T25">.</text:span></text:p>
      <text:p text:style-name="P28"/>
      <text:p text:style-name="Heading_20_3">Comptes <text:span text:style-name="T28">externes</text:span></text:p>
      <text:p text:style-name="Standard">Afficher la liste des comptes externes</text:p>
      <text:p text:style-name="P35">Ajout d’un <text:span text:style-name="T28">compte externe </text:span>: saisie <text:span text:style-name="T28">de l’identifiant </text:span><text:span text:style-name="T3"><text:s/></text:span><text:span text:style-name="T4">(obligatoire) </text:span>et du libellé</text:p>
      <text:p text:style-name="P3">Modification d’un <text:span text:style-name="T29">compte externe </text:span> : modification d<text:span text:style-name="T29">e l’identifiant</text:span> et/ou du libellé</text:p>
      <text:p text:style-name="P3">Suppression d’un <text:span text:style-name="T30">compte externe</text:span></text:p>
      <text:p text:style-name="Standard"/>
      <text:p text:style-name="P36"><text:span text:style-name="T31">CompteExterne</text:span><text:span text:style-name="T12">Controller</text:span></text:p>
      <text:p text:style-name="P37"><text:span text:style-name="T32">GET<text:tab/><text:tab/>/monatis/</text:span><text:span text:style-name="T33">comptes</text:span><text:span text:style-name="T32">/</text:span><text:span text:style-name="T33">externe</text:span><text:span text:style-name="T32">/all</text:span></text:p>
      <text:p text:style-name="P38">GET<text:tab/><text:tab/>/monatis/<text:span text:style-name="T34">comptes</text:span>/<text:span text:style-name="T34">externe</text:span>/<text:span text:style-name="T5">get/{</text:span><text:span text:style-name="T35">identifiant</text:span><text:span text:style-name="T5">}</text:span></text:p>
      <text:p text:style-name="P38"><text:span text:style-name="T6">POST<text:tab/><text:tab/></text:span>/monatis/<text:span text:style-name="T34">comptes</text:span>/<text:span text:style-name="T34">externe</text:span>/<text:span text:style-name="T7">new</text:span></text:p>
      <text:p text:style-name="P39"><text:span text:style-name="T6">P</text:span><text:span text:style-name="T8">UT</text:span><text:span text:style-name="T6"><text:tab/><text:tab/></text:span>/monatis/<text:span text:style-name="T34">comptes</text:span>/<text:span text:style-name="T34">externe</text:span>/<text:span text:style-name="T9">mod/{</text:span><text:span text:style-name="T35">identifiant</text:span><text:span text:style-name="T9">}</text:span></text:p>
      <text:p text:style-name="P40">DELETE<text:tab/><text:tab/>/monatis/<text:span text:style-name="T34">comptes</text:span>/<text:span text:style-name="T34">externe</text:span>/<text:span text:style-name="T10">del</text:span><text:span text:style-name="T9">/{</text:span><text:span text:style-name="T35">identifiant</text:span><text:span text:style-name="T9">}</text:span></text:p>
      <text:p text:style-name="P41"/>
      <text:p text:style-name="P42"/>
      <text:p text:style-name="P42"/>
      <text:p text:style-name="Standard"/>
      <text:p text:style-name="Heading_20_3"><text:soft-page-break/>Comptes internes <text:span text:style-name="T36">et évaluations</text:span></text:p>
      <text:p text:style-name="P43">Afficher la liste des comptes <text:span text:style-name="T37">in</text:span>ternes, <text:span text:style-name="T38">avec peut-être un pré-choix sur le type de fonctionnement.</text:span></text:p>
      <text:p text:style-name="P44"/>
      <text:p text:style-name="P45"><text:span text:style-name="T39">Ajout d’un </text:span><text:span text:style-name="T40">compte </text:span><text:span text:style-name="T41">in</text:span><text:span text:style-name="T40">terne</text:span><text:span text:style-name="T28"> </text:span>: </text:p>
      <text:list text:style-name="L1">
        <text:list-item>
          <text:p text:style-name="P46">saisie <text:span text:style-name="T28">de l’identifian</text:span><text:span text:style-name="T3">t </text:span><text:span text:style-name="T4">(obligatoire)</text:span><text:span text:style-name="T28">, </text:span></text:p>
        </text:list-item>
        <text:list-item>
          <text:p text:style-name="P46">du libellé <text:span text:style-name="T42">(facultatif)</text:span>, </text:p>
        </text:list-item>
        <text:list-item>
          <text:p text:style-name="P46"><text:span text:style-name="T43">de la date de solde initial </text:span><text:span text:style-name="T44">c’est à dire la </text:span><text:span text:style-name="T43">date à parti</text:span><text:span text:style-name="T45">r</text:span><text:span text:style-name="T43"> de laquelle on compte </text:span><text:span text:style-name="T45">saisir des opérations </text:span><text:span text:style-name="T46">(obligatoire)</text:span><text:span text:style-name="T45">, </text:span></text:p>
        </text:list-item>
        <text:list-item>
          <text:p text:style-name="P47"><text:span text:style-name="T45">le montant du solde initial, </text:span><text:span text:style-name="T47">c’est à dire le </text:span><text:span text:style-name="T45">solde du compte à la veille </text:span><text:span text:style-name="T48">ou au matin </text:span><text:span text:style-name="T45">de la date de solde initial </text:span><text:span text:style-name="T49">(obligatoire, peut être à zéro voire en négatif)</text:span><text:span text:style-name="T45">, </text:span></text:p>
        </text:list-item>
        <text:list-item>
          <text:p text:style-name="P48"><text:span text:style-name="T50">l</text:span><text:span text:style-name="T51">a banque (facultative, </text:span><text:span text:style-name="T52">parmi toutes les banques </text:span><text:span text:style-name="T53">enregistrées</text:span><text:span text:style-name="T51">)</text:span></text:p>
        </text:list-item>
        <text:list-item>
          <text:p text:style-name="P48"><text:span text:style-name="T51">le ou les titulaires du compte (</text:span><text:span text:style-name="T54">facultatif</text:span><text:span text:style-name="T55">s</text:span><text:span text:style-name="T54">, </text:span><text:span text:style-name="T52">parmi tous les titulaires </text:span><text:span text:style-name="T56">enregistrés</text:span><text:span text:style-name="T54">)</text:span></text:p>
        </text:list-item>
        <text:list-item>
          <text:p text:style-name="P49"><text:span text:style-name="T57">peut-être </text:span>le type de fonctionnement <text:span text:style-name="T57">si on n’a pas déjà fait le pré-choix </text:span>(obligatoire, parmi <text:span text:style-name="T58">tous </text:span>les types de fonctionnement)</text:p>
        </text:list-item>
      </text:list>
      <text:p text:style-name="P50"><text:span text:style-name="T39">Modification d’un </text:span><text:span text:style-name="T59">compte </text:span><text:span text:style-name="T60">in</text:span><text:span text:style-name="T59">terne</text:span><text:span text:style-name="T29"> </text:span> : modification <text:span text:style-name="T61">de l’identifiant, du libellé, de </text:span><text:span text:style-name="T36">la </text:span><text:span text:style-name="T61">date de solde initial, du montant du solde initial, de la banque, de la liste des titulaires</text:span><text:span text:style-name="T62">, </text:span><text:span text:style-name="T63">avec en plus la possibilité de définir une date de clôture.</text:span></text:p>
      <text:p text:style-name="P51"><text:span text:style-name="T64">Évaluations</text:span><text:span text:style-name="T65"> : p</text:span><text:span text:style-name="T18">our un </text:span><text:span text:style-name="T66">compte</text:span><text:span text:style-name="T18">, a</text:span>ffichage de <text:span text:style-name="T67">sa</text:span> liste des <text:span text:style-name="T68">évaluations</text:span></text:p>
      <text:p text:style-name="P20"><text:span text:style-name="T39">Ajout d’une nouvelle </text:span><text:span text:style-name="T64">évaluation</text:span> :</text:p>
      <text:list text:style-name="L2">
        <text:list-item>
          <text:p text:style-name="P52">de la clé (facultatif et pas très utile en fait)</text:p>
        </text:list-item>
        <text:list-item>
          <text:p text:style-name="P53"><text:span text:style-name="T69">du libellé </text:span><text:span text:style-name="T70">(facultatif)</text:span></text:p>
        </text:list-item>
        <text:list-item>
          <text:p text:style-name="P53">de la date de l’évaluation</text:p>
        </text:list-item>
        <text:list-item>
          <text:p text:style-name="P53"><text:span text:style-name="T71">la</text:span> <text:span text:style-name="T71">valeur du compte à la date indiquée (valeur potentielle ou valeur réelle) </text:span><text:span text:style-name="T72">après toutes les opérations de la journée</text:span></text:p>
        </text:list-item>
      </text:list>
      <text:p text:style-name="P20"><text:span text:style-name="T39">Modification d’une </text:span><text:span text:style-name="T73">évaluation</text:span> <text:span text:style-name="T1">: modification </text:span><text:span text:style-name="T74">de la clé (bof), </text:span><text:span text:style-name="T75">du libellé, de la date, et du montant</text:span></text:p>
      <text:p text:style-name="P54">Suppression d’une <text:span text:style-name="T76">évaluation</text:span></text:p>
      <text:p text:style-name="P20">Fermeture de la liste des <text:span text:style-name="T77">évaluations</text:span></text:p>
      <text:p text:style-name="P55">Suppression d’un <text:span text:style-name="T30">compte </text:span><text:span text:style-name="T78">in</text:span><text:span text:style-name="T30">terne</text:span></text:p>
      <text:p text:style-name="P56"/>
      <text:p text:style-name="P57"><text:span text:style-name="T31">Compte</text:span><text:span text:style-name="T79">Interne</text:span><text:span text:style-name="T12">Controller</text:span></text:p>
      <text:p text:style-name="P58"><text:span text:style-name="T32">GET<text:tab/><text:tab/>/monatis/</text:span><text:span text:style-name="T33">comptes</text:span><text:span text:style-name="T32">/</text:span><text:span text:style-name="T80">interne</text:span><text:span text:style-name="T32">/all</text:span></text:p>
      <text:p text:style-name="P59">GET<text:tab/><text:tab/>/monatis/<text:span text:style-name="T34">comptes</text:span>/<text:span text:style-name="T81">interne</text:span>/<text:span text:style-name="T5">get/{</text:span><text:span text:style-name="T35">identifiant</text:span><text:span text:style-name="T5">}</text:span></text:p>
      <text:p text:style-name="P59"><text:span text:style-name="T6">POST<text:tab/><text:tab/></text:span>/monatis/<text:span text:style-name="T34">comptes</text:span>/<text:span text:style-name="T81">interne</text:span>/<text:span text:style-name="T7">new</text:span></text:p>
      <text:p text:style-name="P59"><text:span text:style-name="T6">P</text:span><text:span text:style-name="T8">UT</text:span><text:span text:style-name="T6"><text:tab/><text:tab/></text:span>/monatis/<text:span text:style-name="T34">comptes</text:span>/<text:span text:style-name="T81">interne</text:span>/<text:span text:style-name="T9">mod/{</text:span><text:span text:style-name="T35">identifiant</text:span><text:span text:style-name="T9">}</text:span></text:p>
      <text:p text:style-name="P60">DELETE<text:tab/><text:tab/>/monatis/<text:span text:style-name="T34">comptes</text:span>/<text:span text:style-name="T81">interne</text:span>/<text:span text:style-name="T10">del</text:span><text:span text:style-name="T9">/{</text:span><text:span text:style-name="T35">identifiant</text:span><text:span text:style-name="T9">}</text:span></text:p>
      <text:p text:style-name="P60"/>
      <text:p text:style-name="P61"><text:span text:style-name="T32">GET<text:tab/><text:tab/>/monatis/comptes/interne/</text:span><text:span text:style-name="T82">fonctionnement</text:span><text:span text:style-name="T83">/</text:span><text:span text:style-name="T32">{</text:span><text:span text:style-name="T84">codeTypeFonctionnement}</text:span></text:p>
      <text:p text:style-name="P62"><text:span text:style-name="T85">T</text:span>ous les comptes internes d<text:span text:style-name="T86">u</text:span> type de fonctionnement <text:span text:style-name="T86">indiqué</text:span></text:p>
      <text:p text:style-name="P63"/>
      <text:p text:style-name="P63">GET<text:tab/><text:tab/>/monatis/comptes/interne/typologie/fonctionnement</text:p>
      <text:p text:style-name="P63"><text:span text:style-name="T87">T</text:span><text:span text:style-name="T88">ous les types de fonctionnement</text:span></text:p>
      <text:p text:style-name="P64"/>
      <text:p text:style-name="P65"><text:span text:style-name="T32"/></text:p>
      <text:p text:style-name="P66"><text:span text:style-name="T89">Evaluation</text:span><text:span text:style-name="T12">Controller</text:span></text:p>
      <text:p text:style-name="P67"><text:span text:style-name="T32">GET<text:tab/><text:tab/>/monatis/</text:span><text:span text:style-name="T90">evaluations</text:span><text:span text:style-name="T32">/all</text:span></text:p>
      <text:p text:style-name="P68">GET<text:tab/><text:tab/>/monatis/<text:span text:style-name="T91">evaluations</text:span>/<text:span text:style-name="T5">get/{</text:span><text:span text:style-name="T92">cle</text:span><text:span text:style-name="T5">}</text:span></text:p>
      <text:p text:style-name="P68"><text:span text:style-name="T6">POST<text:tab/><text:tab/></text:span>/monatis/<text:span text:style-name="T91">evaluations</text:span>/<text:span text:style-name="T7">new</text:span></text:p>
      <text:p text:style-name="P68"><text:span text:style-name="T6">P</text:span><text:span text:style-name="T8">UT</text:span><text:span text:style-name="T6"><text:tab/><text:tab/></text:span>/monatis/<text:span text:style-name="T91">evaluations</text:span>/<text:span text:style-name="T9">mod/{</text:span><text:span text:style-name="T92">cle</text:span><text:span text:style-name="T9">}</text:span></text:p>
      <text:p text:style-name="P69">DELETE<text:tab/><text:tab/>/monatis/<text:span text:style-name="T91">evaluations</text:span>/<text:span text:style-name="T10">del</text:span><text:span text:style-name="T9">/{</text:span><text:span text:style-name="T92">cle</text:span><text:span text:style-name="T9">}</text:span></text:p>
      <text:p text:style-name="P70"/>
      <text:p text:style-name="P71">Selection des évaluations <text:span text:style-name="T93">d’</text:span>un compte interne donné</text:p>
      <text:p text:style-name="P70"/>
      <text:p text:style-name="P72"><text:span text:style-name="T94">GET<text:tab/><text:tab/>/monatis/</text:span><text:span text:style-name="T90">evaluations</text:span><text:span text:style-name="T94">/</text:span><text:span text:style-name="T95">selection/toutes_par_compte</text:span></text:p>
      <text:p text:style-name="P73"><text:soft-page-break/><text:span text:style-name="T87">T</text:span><text:span text:style-name="T88">ou</text:span><text:span text:style-name="T96">tes </text:span><text:span text:style-name="T88">les </text:span><text:span text:style-name="T96">évaluations du compte </text:span><text:span text:style-name="T97">interne </text:span><text:span text:style-name="T98">indiqué</text:span></text:p>
      <text:p text:style-name="P74"/>
      <text:p text:style-name="P74">Les <text:span text:style-name="T99">critères de sélection </text:span><text:span text:style-name="T100">doivent être déclarés dans le dto <text:s/></text:span><text:span text:style-name="T101">EvaluationSelectionRequestDto</text:span></text:p>
      <text:p text:style-name="P75"/>
      <text:p text:style-name="P76" loext:marker-style-name="T102"><text:span text:style-name="T103"><text:tab/></text:span><text:span text:style-name="T104">public</text:span><text:span text:style-name="T103"> String </text:span><text:span text:style-name="T105">identifiantCompte</text:span><text:span text:style-name="T106">Interne</text:span><text:span text:style-name="T103">;</text:span></text:p>
      <text:p text:style-name="P77" loext:marker-style-name="T102"><text:span text:style-name="T103"/></text:p>
      <text:p text:style-name="P74">L’identifiant d<text:span text:style-name="T107">u compte est obligatoire, </text:span><text:span text:style-name="T108">et doit être l’identifiant d’un compte interne</text:span><text:span text:style-name="T107">.</text:span></text:p>
      <text:p text:style-name="P78"/>
      <text:p text:style-name="P78"/>
      <text:p text:style-name="P79"/>
      <text:p text:style-name="Heading_20_3">Opérations</text:p>
      <text:p text:style-name="P80"><text:span text:style-name="T109"/></text:p>
      <text:p text:style-name="P81"><text:span text:style-name="T110">Operation</text:span><text:span text:style-name="T12">Controller</text:span></text:p>
      <text:p text:style-name="P82"><text:span text:style-name="T32">GET<text:tab/><text:tab/>/monatis/</text:span><text:span text:style-name="T111">operations</text:span><text:span text:style-name="T32">/all</text:span></text:p>
      <text:p text:style-name="P83">GET<text:tab/><text:tab/>/monatis/<text:span text:style-name="T112">operations</text:span>/<text:span text:style-name="T5">get/{</text:span><text:span text:style-name="T113">numero</text:span><text:span text:style-name="T5">}</text:span></text:p>
      <text:p text:style-name="P83"><text:span text:style-name="T6">POST<text:tab/><text:tab/></text:span>/monatis/<text:span text:style-name="T112">operations</text:span>/<text:span text:style-name="T7">new</text:span></text:p>
      <text:p text:style-name="P83"><text:span text:style-name="T6">P</text:span><text:span text:style-name="T8">UT</text:span><text:span text:style-name="T6"><text:tab/><text:tab/></text:span>/monatis/<text:span text:style-name="T112">operations</text:span>/<text:span text:style-name="T9">mod/{</text:span><text:span text:style-name="T113">numero</text:span><text:span text:style-name="T9">}</text:span></text:p>
      <text:p text:style-name="P84"><text:span text:style-name="T32">DELETE<text:tab/><text:tab/>/monatis/</text:span><text:span text:style-name="T111">operations</text:span><text:span text:style-name="T32">/</text:span><text:span text:style-name="T114">del</text:span><text:span text:style-name="T115">/{</text:span><text:span text:style-name="T116">numero</text:span><text:span text:style-name="T115">}</text:span></text:p>
      <text:p text:style-name="P85"/>
      <text:h text:style-name="P86" text:outline-level="4"><text:span text:style-name="T117">Recherche</text:span><text:span text:style-name="T118"> </text:span><text:span text:style-name="T119">d’une</text:span><text:span text:style-name="T118"> </text:span><text:span text:style-name="T119">sélection d’</text:span><text:span text:style-name="T118">opérations</text:span></text:h>
      <text:h text:style-name="P87" text:outline-level="5">Dernières opérations d’un compte donné à une date de valeur donnée</text:h>
      <text:p text:style-name="Standard"/>
      <text:p text:style-name="P88"><text:span text:style-name="T32">GET<text:tab/><text:tab/>/monatis/</text:span><text:span text:style-name="T111">operations</text:span><text:span text:style-name="T32">/</text:span><text:span text:style-name="T120">selection/</text:span><text:span text:style-name="T121">dernieres</text:span><text:span text:style-name="T122">_par_</text:span><text:span text:style-name="T121">compte</text:span></text:p>
      <text:p text:style-name="P89"/>
      <text:p text:style-name="P90">Les <text:span text:style-name="T99">critères de sélection </text:span><text:span text:style-name="T100">doivent être déclarés dans le dto <text:s/></text:span><text:span text:style-name="T101">OperationSelectionRequestDto</text:span></text:p>
      <text:p text:style-name="P91"/>
      <text:p text:style-name="P92" loext:marker-style-name="T102"><text:span text:style-name="T103"><text:tab/></text:span><text:span text:style-name="T104">public</text:span><text:span text:style-name="T103"> String </text:span><text:span text:style-name="T105">identifiantCompte</text:span><text:span text:style-name="T103">;</text:span></text:p>
      <text:p text:style-name="P92" loext:marker-style-name="T102"><text:span text:style-name="T103"><text:tab/></text:span><text:span text:style-name="T104">public</text:span><text:span text:style-name="T103"> LocalDate </text:span><text:span text:style-name="T105">date</text:span><text:span text:style-name="T123">Valeur</text:span><text:span text:style-name="T105">Fin</text:span><text:span text:style-name="T103">;</text:span></text:p>
      <text:p text:style-name="P93" loext:marker-style-name="T102"><text:span text:style-name="T103"><text:tab/></text:span><text:span text:style-name="T104">public</text:span><text:span text:style-name="T103"> Long </text:span><text:span text:style-name="T124">nombreLimite</text:span><text:span text:style-name="T103">;</text:span></text:p>
      <text:p text:style-name="P91"/>
      <text:p text:style-name="Standard">L’identifiant d<text:span text:style-name="T107">u compte est obligatoire.</text:span></text:p>
      <text:p text:style-name="P94">Par défaut, la date de valeur finale est la date du jour.</text:p>
      <text:p text:style-name="P94">Par défaut, le nombre d’opérations maximum à récupérer est 5.</text:p>
      <text:p text:style-name="P95"/>
      <text:h text:style-name="P96" text:outline-level="4"><text:span text:style-name="T125">Création</text:span><text:span text:style-name="T126"> d’une opération</text:span><text:span text:style-name="T127"> </text:span><text:span text:style-name="T126">isolée</text:span></text:h>
      <text:h text:style-name="P97" text:outline-level="5">Choix du type d’opération</text:h>
      <text:p text:style-name="Standard">Afficher la liste de tous les types d’opérations</text:p>
      <text:p text:style-name="Standard"/>
      <text:p text:style-name="P98"><text:span text:style-name="T128">Operation</text:span><text:span text:style-name="T129">Controller</text:span></text:p>
      <text:p text:style-name="P99"><text:span text:style-name="T94">GET<text:tab/><text:tab/>/monatis/</text:span><text:span text:style-name="T130">operations</text:span><text:span text:style-name="T94">/typologie/</text:span><text:span text:style-name="T130">operation</text:span></text:p>
      <text:p text:style-name="P100"><text:span text:style-name="T87">T</text:span><text:span text:style-name="T88">ous les types d’</text:span><text:span text:style-name="T131">opérations</text:span></text:p>
      <text:p text:style-name="P101"/>
      <text:p text:style-name="P102">Une fois le type d’opération choisi,</text:p>
      <text:h text:style-name="P97" text:outline-level="5">Choix du <text:span text:style-name="T132">premier</text:span> compte</text:h>
      <text:p text:style-name="P103">On recherche les listes des comptes compatibles avec le type d’opération choisi.</text:p>
      <text:p text:style-name="P103"/>
      <text:p text:style-name="P103">En fonction du type d’opération, on peut avoir deux liste (comptes en dépense et comptes en recette), ou une seule liste (liste de comptes en dépense pour les <text:span text:style-name="T133">opérations de</text:span> frais ou liste de comptes en recette pour les <text:span text:style-name="T133">opérations de </text:span>rémunération<text:span text:style-name="T134">s</text:span><text:span text:style-name="T135">)</text:span></text:p>
      <text:p text:style-name="P103"/>
      <text:p text:style-name="P104"><text:span text:style-name="T128">Operation</text:span><text:span text:style-name="T129">Controller</text:span></text:p>
      <text:p text:style-name="P105"><text:span text:style-name="T94">GET<text:tab/><text:tab/>/monatis/</text:span><text:span text:style-name="T130">operations</text:span><text:span text:style-name="T94">/</text:span><text:span text:style-name="T136">compatibilite</text:span><text:span text:style-name="T94">/</text:span><text:span text:style-name="T137">comptes</text:span><text:span text:style-name="T138">/{codeTypeOperation</text:span><text:span text:style-name="T139">Choisi</text:span><text:span text:style-name="T138">}</text:span></text:p>
      <text:p text:style-name="P106"><text:span text:style-name="T140">Une liste de t</text:span><text:span text:style-name="T88">ous les </text:span><text:span text:style-name="T141">comptes compatible</text:span><text:span text:style-name="T142">s</text:span><text:span text:style-name="T141"> e</text:span><text:span text:style-name="T142">n</text:span><text:span text:style-name="T141"> </text:span><text:span text:style-name="T142">dépense</text:span><text:span text:style-name="T141"> avec le </text:span><text:span text:style-name="T88">type d’</text:span><text:span text:style-name="T131">opération </text:span><text:span text:style-name="T141">indiqué </text:span><text:span text:style-name="T140">et une liste de t</text:span><text:span text:style-name="T88">ous les </text:span><text:span text:style-name="T141">comptes compatible</text:span><text:span text:style-name="T142">s</text:span><text:span text:style-name="T141"> e</text:span><text:span text:style-name="T142">n</text:span><text:span text:style-name="T141"> </text:span><text:span text:style-name="T143">recette</text:span><text:span text:style-name="T141"> avec le </text:span><text:span text:style-name="T88">type d’</text:span><text:span text:style-name="T131">opération </text:span><text:span text:style-name="T141">indiqué</text:span><text:span text:style-name="T144">.</text:span></text:p>
      <text:p text:style-name="P107"/>
      <text:p text:style-name="Standard">Une des deux listes peut être à null , <text:span text:style-name="T145">et dans ce cas la drop-liste </text:span><text:span text:style-name="T146">correspondante </text:span><text:span text:style-name="T145">ne doit pas du tout apparaître</text:span>.</text:p>
      <text:p text:style-name="Standard"/>
      <text:p text:style-name="P108">Une fois le premier compte choisi, <text:span text:style-name="T147">affichage des dernières opérations du compte à la date du jour.</text:span></text:p>
      <text:p text:style-name="P105"><text:soft-page-break/></text:p>
      <text:h text:style-name="P97" text:outline-level="5">Choix du second compte</text:h>
      <text:p text:style-name="Standard"/>
      <text:p text:style-name="P109"><text:span text:style-name="T148">Cette partie du scénario s</text:span>eu<text:span text:style-name="T149">le</text:span>ment s’il y avait deux listes <text:span text:style-name="T149">calculées à l’étape précédente</text:span></text:p>
      <text:p text:style-name="Standard"/>
      <text:p text:style-name="P110"><text:span text:style-name="T39">Si le premier compte a été sélectionné dans la liste des comptes compatibles</text:span><text:span text:style-name="T150"> en recette</text:span>, on recalcule la liste des comptes compatibles en dépense, <text:span text:style-name="T151">d’après le type d’opération choisi et le compte choisi en recette aux étapes précédentes.</text:span></text:p>
      <text:p text:style-name="Standard"/>
      <text:p text:style-name="P111"><text:span text:style-name="T94">GET<text:tab/><text:tab/>/monatis/</text:span><text:span text:style-name="T130">operations</text:span><text:span text:style-name="T94">/</text:span><text:span text:style-name="T136">compatibilite</text:span><text:span text:style-name="T152">/</text:span><text:span text:style-name="T153">comptes/</text:span><text:span text:style-name="T154">depense/{codeTypeOperationChoisi}/{identifiantCompteChoisiRecette}</text:span></text:p>
      <text:p text:style-name="P112"/>
      <text:p text:style-name="P113"><text:span text:style-name="T39">Si le premier compte a été sélectionné dans la liste des comptes compatibles en </text:span><text:span text:style-name="T155">dépense</text:span>, on recalcule la liste des comptes compatibles en <text:span text:style-name="T156">recette</text:span>, <text:span text:style-name="T151">d’après le type d’opération choisi et le compte choisi en </text:span><text:span text:style-name="T157">dépense</text:span><text:span text:style-name="T151"> aux étapes précédentes.</text:span></text:p>
      <text:p text:style-name="P114"/>
      <text:p text:style-name="P114"><text:span text:style-name="T94">GET<text:tab/><text:tab/>/monatis/</text:span><text:span text:style-name="T130">operations</text:span><text:span text:style-name="T94">/</text:span><text:span text:style-name="T136">compatibilite</text:span><text:span text:style-name="T94">/</text:span><text:span text:style-name="T158">comptes/</text:span><text:span text:style-name="T159">recette</text:span><text:span text:style-name="T160">/{codeTypeOperationChoisi}/{identifiantCompteChoisi</text:span><text:span text:style-name="T161">Depense</text:span><text:span text:style-name="T160">}</text:span></text:p>
      <text:p text:style-name="Standard"/>
      <text:p text:style-name="Standard">Un fois le <text:span text:style-name="T162">second compte choisi, </text:span></text:p>
      <text:p text:style-name="Standard"/>
      <text:h text:style-name="P97" text:outline-level="5">Saisie des données de l’opération : </text:h>
      <text:list xml:id="list1653891561" text:style-name="L3">
        <text:list-item>
          <text:p text:style-name="P115">La date (obligatoire)</text:p>
        </text:list-item>
        <text:list-item>
          <text:p text:style-name="P115">Le montant (obligatoire, <text:span text:style-name="T163">peut être 0 ou négatif</text:span>)</text:p>
        </text:list-item>
        <text:list-item>
          <text:p text:style-name="P116">Le libellé (facultatif)</text:p>
        </text:list-item>
        <text:list-item>
          <text:p text:style-name="P117">Le numéro (facultatif, sera généré automatiquement avec une séquence <text:span text:style-name="T164">s’il n’est pas indiqué</text:span>)</text:p>
        </text:list-item>
      </text:list>
      <text:p text:style-name="P118"/>
      <text:p text:style-name="P119">Seulement pour les opérations de type RECETTE ou DEPENSE :</text:p>
      <text:list text:style-name="L4">
        <text:list-item>
          <text:p text:style-name="P120">La sous-catégorie (facultatif)</text:p>
        </text:list-item>
        <text:list-item>
          <text:p text:style-name="P120">Le ou les bénéficiaires (facultatif)</text:p>
        </text:list-item>
      </text:list>
      <text:p text:style-name="Standard"/>
      <text:p text:style-name="P121"/>
      <text:p text:style-name="P122"><text:span text:style-name="T165">Categorie</text:span><text:span text:style-name="T12">Controller</text:span></text:p>
      <text:p text:style-name="P123">GET<text:tab/><text:tab/>/monatis/references/<text:span text:style-name="T166">categorie</text:span>/all</text:p>
      <text:p text:style-name="P123"><text:span text:style-name="T32"/></text:p>
      <text:p text:style-name="P122"><text:span text:style-name="T165">Beneficiaire</text:span><text:span text:style-name="T12">Controller</text:span></text:p>
      <text:p text:style-name="P123">GET<text:tab/><text:tab/>/monatis/references/<text:span text:style-name="T16">beneficiaire</text:span>/all</text:p>
      <text:p text:style-name="P124"/>
      <text:h text:style-name="P97" text:outline-level="5">Enregistrement de l’opération</text:h>
      <text:p text:style-name="P125"><text:span text:style-name="T110">Operation</text:span><text:span text:style-name="T12">Controller</text:span></text:p>
      <text:p text:style-name="P126"><text:span text:style-name="T6">POST<text:tab/><text:tab/></text:span>/monatis/<text:span text:style-name="T167">operation</text:span><text:span text:style-name="T91">s</text:span>/<text:span text:style-name="T7">new</text:span></text:p>
      <text:list text:style-name="L5">
        <text:list-item>
          <text:list>
            <text:list-item>
              <text:list>
                <text:list-item>
                  <text:list>
                    <text:list-header>
                      <text:p text:style-name="P127"/>
                    </text:list-header>
                  </text:list>
                </text:list-item>
              </text:list>
            </text:list-item>
          </text:list>
        </text:list-item>
      </text:list>
      <text:p text:style-name="P128"/>
      <text:h text:style-name="P129" text:outline-level="4"><text:span text:style-name="T168">Création</text:span><text:span text:style-name="T169"> d’une liste d’opérations d’après u</text:span><text:span text:style-name="T170">n</text:span><text:span text:style-name="T169"> relevé</text:span></text:h>
      <text:p text:style-name="P130"/>
      <text:h text:style-name="P97" text:outline-level="5">Choix du premier compte</text:h>
      <text:p text:style-name="P131">Le compte est choisi à partir d’une liste de comptes quelconque, <text:span text:style-name="T171">comportant par exemple un bouton « nouvelles opérations »</text:span>.</text:p>
      <text:p text:style-name="P131"><text:soft-page-break/></text:p>
      <text:p text:style-name="P132">Une fois le premier compte choisi, <text:span text:style-name="T147">affichage des dernières opérations du compte à la date du jour.</text:span></text:p>
      <text:p text:style-name="P133"/>
      <text:h text:style-name="P97" text:outline-level="5"><text:bookmark text:name="choix type operation"/>Choix du type d’opération</text:h>
      <text:p text:style-name="P134">On recherche l<text:span text:style-name="T172">es</text:span> <text:span text:style-name="T173">deux </text:span>lis<text:span text:style-name="T174">te</text:span><text:span text:style-name="T172">s</text:span><text:span text:style-name="T174"> d’opérations compatibles avec le compte choisi ci-dessus.</text:span></text:p>
      <text:p text:style-name="P135"><text:span text:style-name="T128">Operation</text:span><text:span text:style-name="T129">Controller</text:span></text:p>
      <text:p text:style-name="P136"><text:span text:style-name="T94">GET<text:tab/><text:tab/>/monatis/</text:span><text:span text:style-name="T175">operations/</text:span><text:span text:style-name="T176">compatibilite/typesoperations/</text:span><text:span text:style-name="T177">{identifiantCompteChoisi}</text:span></text:p>
      <text:p text:style-name="P137"><text:span text:style-name="T178">On obtient u</text:span><text:span text:style-name="T140">ne liste de t</text:span><text:span text:style-name="T88">ous les </text:span><text:span text:style-name="T179">types d’opérations</text:span><text:span text:style-name="T141"> compatible</text:span><text:span text:style-name="T142">s</text:span><text:span text:style-name="T141"> e</text:span><text:span text:style-name="T142">n</text:span><text:span text:style-name="T141"> </text:span><text:span text:style-name="T142">dépense</text:span><text:span text:style-name="T141"> avec le </text:span><text:span text:style-name="T179">compte</text:span><text:span text:style-name="T131"> </text:span><text:span text:style-name="T141">indiqué </text:span><text:span text:style-name="T140">et une liste de t</text:span><text:span text:style-name="T88">ous les </text:span><text:span text:style-name="T180">types d’opérations</text:span><text:span text:style-name="T141"> compatible</text:span><text:span text:style-name="T142">s</text:span><text:span text:style-name="T141"> e</text:span><text:span text:style-name="T142">n</text:span><text:span text:style-name="T141"> </text:span><text:span text:style-name="T143">recette</text:span><text:span text:style-name="T141"> avec le </text:span><text:span text:style-name="T180">compte</text:span><text:span text:style-name="T131"> </text:span><text:span text:style-name="T141">indiqué</text:span><text:span text:style-name="T144">.</text:span></text:p>
      <text:p text:style-name="Standard"/>
      <text:p text:style-name="P138">Une fois le type d’opération choisi,</text:p>
      <text:p text:style-name="Standard"/>
      <text:h text:style-name="P97" text:outline-level="5">Choix du second compte</text:h>
      <text:p text:style-name="P139"><text:span text:style-name="T39">Si le </text:span><text:span text:style-name="T181">type d’opération</text:span><text:span text:style-name="T39"> a été sélectionné dans la liste des </text:span><text:span text:style-name="T182">types d’opérations</text:span><text:span text:style-name="T39"> </text:span><text:span text:style-name="T183">de</text:span><text:span text:style-name="T39"> </text:span><text:span text:style-name="T184">dépense</text:span>, on recalcule la liste des comptes compatibles en <text:span text:style-name="T185">recette</text:span>, <text:span text:style-name="T151">d’après le type d’opération choisi et le compte choisi.</text:span></text:p>
      <text:p text:style-name="P139"/>
      <text:p text:style-name="P140"><text:span text:style-name="T94">GET /monatis/</text:span><text:span text:style-name="T130">operations</text:span><text:span text:style-name="T94">/</text:span><text:span text:style-name="T136">compatibilite</text:span><text:span text:style-name="T94">/</text:span><text:span text:style-name="T186">comptes/</text:span><text:span text:style-name="T187">recette</text:span><text:span text:style-name="T188">/{codeTypeOperationChoisi</text:span><text:span text:style-name="T189">Depense</text:span><text:span text:style-name="T188">}/{identifiantCompteChoisi}</text:span></text:p>
      <text:p text:style-name="P141"/>
      <text:p text:style-name="P142"><text:span text:style-name="T39">Si le </text:span><text:span text:style-name="T181">type d’opération</text:span><text:span text:style-name="T39"> a été sélectionné dans la liste des </text:span><text:span text:style-name="T182">types d’opérations</text:span><text:span text:style-name="T39"> </text:span><text:span text:style-name="T183">de</text:span><text:span text:style-name="T39"> recette</text:span>, on recalcule la liste des comptes compatibles en dépense, <text:span text:style-name="T151">d’après le type d’opération choisi et le compte choisi.</text:span></text:p>
      <text:p text:style-name="P142"/>
      <text:p text:style-name="P143"><text:span text:style-name="T94">GET /monatis/</text:span><text:span text:style-name="T130">operations</text:span><text:span text:style-name="T94">/</text:span><text:span text:style-name="T136">compatibilite</text:span><text:span text:style-name="T94">/</text:span><text:span text:style-name="T186">comptes/</text:span><text:span text:style-name="T190">depense</text:span><text:span text:style-name="T188">/{codeTypeOperationChoisi</text:span><text:span text:style-name="T191">Recette</text:span><text:span text:style-name="T188">}/{identifiantCompteChoisi}</text:span></text:p>
      <text:p text:style-name="P142"/>
      <text:p text:style-name="P140">Un fois le <text:span text:style-name="T162">second compte choisi,</text:span></text:p>
      <text:p text:style-name="P140"/>
      <text:h text:style-name="P97" text:outline-level="5">Saisie des données de l’opération : </text:h>
      <text:list text:continue-list="list1653891561" text:style-name="L3">
        <text:list-item>
          <text:p text:style-name="P144">La date (obligatoire)</text:p>
        </text:list-item>
        <text:list-item>
          <text:p text:style-name="P144">Le montant (obligatoire, <text:span text:style-name="T163">peut être 0 ou négatif</text:span>)</text:p>
        </text:list-item>
        <text:list-item>
          <text:p text:style-name="P145">Le libellé (facultatif)</text:p>
        </text:list-item>
        <text:list-item>
          <text:p text:style-name="P146">Le numéro (facultatif, sera généré automatiquement avec une séquence <text:span text:style-name="T164">s’il n’est pas indiqué</text:span>)</text:p>
        </text:list-item>
      </text:list>
      <text:p text:style-name="P147"/>
      <text:p text:style-name="P148">Seulement pour les opérations de type RECETTE ou DEPENSE :</text:p>
      <text:list text:style-name="L6">
        <text:list-item>
          <text:p text:style-name="P149">La sous-catégorie (facultatif)</text:p>
        </text:list-item>
        <text:list-item>
          <text:p text:style-name="P149">Le ou les bénéficiaires (facultatif)</text:p>
        </text:list-item>
      </text:list>
      <text:p text:style-name="P148"/>
      <text:p text:style-name="P150"><text:span text:style-name="T165">Categorie</text:span><text:span text:style-name="T12">Controller</text:span></text:p>
      <text:p text:style-name="P151">GET<text:tab/><text:tab/>/monatis/references/<text:span text:style-name="T166">categorie</text:span>/all</text:p>
      <text:p text:style-name="P151"><text:span text:style-name="T32"/></text:p>
      <text:p text:style-name="P150"><text:span text:style-name="T165">Beneficiaire</text:span><text:span text:style-name="T12">Controller</text:span></text:p>
      <text:p text:style-name="P151">GET<text:tab/><text:tab/>/monatis/references/<text:span text:style-name="T16">beneficiaire</text:span>/all</text:p>
      <text:p text:style-name="Standard"/>
      <text:h text:style-name="P97" text:outline-level="5">Enregistrement de l’opération</text:h>
      <text:p text:style-name="P152"/>
      <text:h text:style-name="P97" text:outline-level="5"><text:soft-page-break/>Réaffichage</text:h>
      <text:p text:style-name="Text_20_body"/>
      <text:p text:style-name="P153">Une fois l’<text:span text:style-name="T192">enregistrement fait,</text:span> <text:span text:style-name="T147">affichage des dernières opérations du compte à la date </text:span><text:span text:style-name="T193">de valeur de l’opération enregistrée</text:span><text:span text:style-name="T147">.</text:span></text:p>
      <text:p text:style-name="P154"/>
      <text:h text:style-name="P97" text:outline-level="5">Retour au paragraphe « choix du type d’opération »</text:h>
      <text:p text:style-name="P155"/>
      <text:h text:style-name="P96" text:outline-level="4">Suppression d’une opération</text:h>
      <text:p text:style-name="P156"><text:span text:style-name="T194">Operation</text:span><text:span text:style-name="T12">Controller</text:span></text:p>
      <text:p text:style-name="P157">DELETE<text:tab/><text:tab/>/monatis/<text:span text:style-name="T112">operations</text:span>/<text:span text:style-name="T10">del</text:span><text:span text:style-name="T9">/{</text:span><text:span text:style-name="T113">numero</text:span><text:span text:style-name="T9">}</text:span></text:p>
      <text:p text:style-name="P158"><text:span text:style-name="T32"/></text:p>
      <text:p text:style-name="P159"/>
      <text:h text:style-name="P2" text:outline-level="3">Rapports</text:h>
      <text:p text:style-name="P160"><text:span text:style-name="T12"/></text:p>
      <text:p text:style-name="P161"><text:span text:style-name="T126">Relevé </text:span><text:span text:style-name="T195">des opérations par</text:span><text:span text:style-name="T126"> </text:span><text:span text:style-name="T196">compte</text:span><text:span text:style-name="T197"> : </text:span><text:span text:style-name="T198">toutes les opérations effectuées sur le compte </text:span><text:span text:style-name="T199">indiqué </text:span><text:span text:style-name="T198">entre les dates de début et de fin indiqué</text:span><text:span text:style-name="T199">es </text:span><text:span text:style-name="T200">(incluses)</text:span><text:span text:style-name="T198">.</text:span></text:p>
      <text:p text:style-name="P160"><text:span text:style-name="T201">Rapport</text:span><text:span text:style-name="T12">Controller</text:span></text:p>
      <text:p text:style-name="P162"><text:span text:style-name="T32">GET<text:tab/><text:tab/>/monatis/</text:span><text:span text:style-name="T202">rapport</text:span><text:span text:style-name="T203">s</text:span><text:span text:style-name="T32">/</text:span><text:span text:style-name="T203">releve_compte</text:span></text:p>
      <text:p text:style-name="P163"/>
      <text:p text:style-name="P163"/>
      <text:p text:style-name="P164"><text:span text:style-name="T126">Liste enrichie des comptes internes </text:span>: <text:span text:style-name="T204">pour le moment, affichage d’</text:span><text:span text:style-name="T205">un résumé d</text:span><text:span text:style-name="T206">es </text:span><text:span text:style-name="T207">données des </text:span><text:span text:style-name="T204">comptes enrichi</text:span><text:span text:style-name="T207">e</text:span><text:span text:style-name="T208">s</text:span><text:span text:style-name="T204"> du </text:span><text:span text:style-name="T209">montant </text:span><text:span text:style-name="T207">du </text:span><text:span text:style-name="T204">solde à la date indiquée . </text:span><text:span text:style-name="T200">Peut-être plus tard le montant de la plus value potentielle depuis le début du compte ?</text:span></text:p>
      <text:p text:style-name="Standard"><text:span text:style-name="T210">C</text:span><text:span text:style-name="T211">hoix d’un ou plusieurs comptes internes </text:span><text:span text:style-name="T212">(facultatif),</text:span><text:span text:style-name="T211"> </text:span><text:span text:style-name="T212">du </text:span><text:span text:style-name="T211"><text:s/>type de fonctionnement </text:span><text:span text:style-name="T212">(facultatif)</text:span><text:span text:style-name="T211">, </text:span><text:span text:style-name="T213">de la </text:span><text:span text:style-name="T214">date du solde à montrer </text:span><text:span text:style-name="T215">(</text:span><text:span text:style-name="T209">facultatif</text:span><text:span text:style-name="T215">). </text:span><text:span text:style-name="T209">Si la date du solde n’est pas indiquée, c’est la date du jour qui sera utilisée.</text:span></text:p>
      <text:p text:style-name="Standard"/>
      <text:p text:style-name="P165"><text:span text:style-name="T201">Rapport</text:span><text:span text:style-name="T12">Controller</text:span></text:p>
      <text:p text:style-name="P166"><text:span text:style-name="T32">GET<text:tab/><text:tab/>/monatis/</text:span><text:span text:style-name="T202">rapport</text:span><text:span text:style-name="T203">s</text:span><text:span text:style-name="T32">/</text:span><text:span text:style-name="T216">resumes_comptes_internes</text:span></text:p>
      <text:p text:style-name="P167"/>
      <text:p text:style-name="P167"/>
      <text:p text:style-name="P168"><text:span text:style-name="T126">État des dépenses et des recettes </text:span>: <text:span text:style-name="T217">cumuls de </text:span><text:span text:style-name="T218">toutes</text:span><text:span text:style-name="T219"> </text:span><text:span text:style-name="T218">l</text:span><text:span text:style-name="T219">es </text:span>opérations de dépense et <text:span text:style-name="T220">de</text:span> recette <text:span text:style-name="T221">enregistré</text:span><text:span text:style-name="T222">e</text:span><text:span text:style-name="T221">s au niveau des comptes interne courants, </text:span><text:s/><text:span text:style-name="T223">détaillés</text:span> par catégorie et par sous-catégories.</text:p>
      <text:p text:style-name="P168"/>
      <text:p text:style-name="P169"><text:span text:style-name="T224">O</text:span><text:span text:style-name="T225">n</text:span><text:span text:style-name="T224"> peut limiter à une </text:span>liste de catégories <text:span text:style-name="T226">indiquées. </text:span><text:span text:style-name="T227">Pas de catégories indiquées =&gt; toutes les catégories</text:span></text:p>
      <text:p text:style-name="P170"><text:span text:style-name="T228">On peut limiter à</text:span><text:span text:style-name="T229"> </text:span><text:span text:style-name="T230">une liste de sous-catégories </text:span><text:span text:style-name="T227">indiquées</text:span>. <text:span text:style-name="T227">Pas de sous-catégories indiquées =&gt; toutes les sous-catégories des catégories indiquées.</text:span></text:p>
      <text:p text:style-name="P170"><text:span text:style-name="T229">On </text:span><text:span text:style-name="T231">aussi</text:span><text:span text:style-name="T229"> </text:span><text:span text:style-name="T232">filtrer </text:span><text:span text:style-name="T233">les </text:span><text:span text:style-name="T234">montants</text:span><text:span text:style-name="T233"> </text:span><text:span text:style-name="T232">par bénéficiaire.</text:span></text:p>
      <text:p text:style-name="Standard"/>
      <text:p text:style-name="P171">On doit définir le format de l’état produit en indiquant :</text:p>
      <text:list text:style-name="L7">
        <text:list-item>
          <text:p text:style-name="P172">une date de <text:span text:style-name="T235">début de l’état </text:span><text:span text:style-name="T236">(obligatoire)</text:span><text:span text:style-name="T235">,</text:span></text:p>
        </text:list-item>
        <text:list-item>
          <text:p text:style-name="P172">une date de fin de l’état (<text:span text:style-name="T237">f</text:span>acultative<text:span text:style-name="T237">). </text:span><text:span text:style-name="T238">S</text:span>i cette date n’est pas mentionnée, <text:span text:style-name="T237">la date du jour sera utilisée.</text:span></text:p>
        </text:list-item>
        <text:list-item>
          <text:p text:style-name="P173">un type de <text:span text:style-name="T239">période (facultatif) : si la période n’est pas indiquée, </text:span><text:span text:style-name="T240">l’état comportera une seule colonne comportant les informations rech</text:span><text:span text:style-name="T241">e</text:span><text:span text:style-name="T240">rchées valables entre la date de début indiquée et la date de fin indiquée. </text:span><text:span text:style-name="T242">Si la période est indiquée, l’état contiendra plusieurs colonnes, </text:span><text:span text:style-name="T243">dont les dates de début et de fin seront « recadrées » en </text:span><text:span text:style-name="T244">fonction du type de période indiqué.</text:span></text:p>
        </text:list-item>
      </text:list>
      <text:p text:style-name="P174"/>
      <text:p text:style-name="P165"><text:span text:style-name="T201">Rapport</text:span><text:span text:style-name="T12">Controller</text:span></text:p>
      <text:p text:style-name="P166"><text:span text:style-name="T32">GET<text:tab/><text:tab/>/monatis/</text:span><text:span text:style-name="T202">rapport</text:span><text:span text:style-name="T203">s</text:span><text:span text:style-name="T32">/</text:span><text:span text:style-name="T245">depense_recette</text:span></text:p>
      <text:p text:style-name="P175"/>
      <text:p text:style-name="P176"/>
      <text:p text:style-name="P177"><text:span text:style-name="T126">État des rémunérations et des frais</text:span> : <text:span text:style-name="T246">cumuls de tous</text:span><text:span text:style-name="T247"> les frais et rémunérations des comptes </text:span><text:span text:style-name="T246">internes</text:span><text:span text:style-name="T248">, </text:span><text:span text:style-name="T249">détaill</text:span><text:span text:style-name="T250">é</text:span><text:span text:style-name="T249">s</text:span><text:span text:style-name="T248"> par type de fonctionnement </text:span><text:span text:style-name="T251">et par</text:span><text:span text:style-name="T248"> compte.</text:span></text:p>
      <text:p text:style-name="P178"/>
      <text:p text:style-name="P178"><text:span text:style-name="T224">O</text:span><text:span text:style-name="T225">n</text:span><text:span text:style-name="T224"> peut limiter à une </text:span>liste de <text:span text:style-name="T252">types de fonctionnement</text:span> <text:span text:style-name="T226">indiqués. </text:span><text:span text:style-name="T227">Pas de </text:span><text:span text:style-name="T253">type</text:span><text:span text:style-name="T254">s</text:span><text:span text:style-name="T253"> de fonctionnement indiqué</text:span><text:span text:style-name="T254">s</text:span><text:span text:style-name="T253"> </text:span><text:span text:style-name="T227"><text:s/>=&gt; tou</text:span><text:span text:style-name="T255">s les types de fonctionnement</text:span></text:p>
      <text:p text:style-name="P178"><text:span text:style-name="T228">On peut limiter à</text:span><text:span text:style-name="T229"> </text:span><text:span text:style-name="T230">une liste de </text:span><text:span text:style-name="T256">comptes</text:span><text:span text:style-name="T230"> </text:span><text:span text:style-name="T227">indiqué</text:span><text:span text:style-name="T256">s</text:span>. <text:span text:style-name="T227">Pas de </text:span><text:span text:style-name="T256">comptes</text:span><text:span text:style-name="T227"> indiqués =&gt; tous les </text:span><text:span text:style-name="T254">comptes</text:span><text:span text:style-name="T227"> des </text:span><text:span text:style-name="T257">types de fonctionnement indiqués</text:span><text:span text:style-name="T227">.</text:span></text:p>
      <text:p text:style-name="P179"><text:span text:style-name="T229">On </text:span><text:span text:style-name="T231">aussi</text:span><text:span text:style-name="T229"> </text:span><text:span text:style-name="T232">filtrer </text:span><text:span text:style-name="T233">les </text:span><text:span text:style-name="T258">comptes</text:span><text:span text:style-name="T233"> </text:span><text:span text:style-name="T232">par </text:span><text:span text:style-name="T259">titulaire </text:span><text:span text:style-name="T260">du compte</text:span><text:span text:style-name="T232">.</text:span></text:p>
      <text:p text:style-name="P180"><text:soft-page-break/></text:p>
      <text:p text:style-name="P181">On doit définir le format de l’état produit en indiquant :</text:p>
      <text:list text:continue-numbering="true" text:style-name="L7">
        <text:list-item>
          <text:p text:style-name="P182">une date de <text:span text:style-name="T235">début de l’état </text:span><text:span text:style-name="T236">(obligatoire)</text:span><text:span text:style-name="T235">,</text:span></text:p>
        </text:list-item>
        <text:list-item>
          <text:p text:style-name="P182">une date de fin de l’état (<text:span text:style-name="T237">f</text:span>acultative<text:span text:style-name="T237">). </text:span><text:span text:style-name="T238">S</text:span>i cette date n’est pas mentionnée, <text:span text:style-name="T237">la date du jour sera utilisée.</text:span></text:p>
        </text:list-item>
        <text:list-item>
          <text:p text:style-name="P183">un type de <text:span text:style-name="T239">période (facultatif) : si la période n’est pas indiquée, </text:span><text:span text:style-name="T240">l’état comportera une seule colonne comportant les informations rech</text:span><text:span text:style-name="T241">e</text:span><text:span text:style-name="T240">rchées valables entre la date de début indiquée et la date de fin indiquée. </text:span><text:span text:style-name="T242">Si la période est indiquée, l’état contiendra plusieurs colonnes, </text:span><text:span text:style-name="T243">dont les dates de début et de fin seront « recadrées » en </text:span><text:span text:style-name="T244">fonction du type de période indiqué.</text:span></text:p>
        </text:list-item>
      </text:list>
      <text:p text:style-name="P184"/>
      <text:p text:style-name="P165"><text:span text:style-name="T201">Rapport</text:span><text:span text:style-name="T12">Controller</text:span></text:p>
      <text:p text:style-name="P166"><text:span text:style-name="T32">GET<text:tab/><text:tab/>/monatis/</text:span><text:span text:style-name="T202">rapport</text:span><text:span text:style-name="T203">s</text:span><text:span text:style-name="T32">/</text:span><text:span text:style-name="T261">remunerations</text:span><text:span text:style-name="T245">_</text:span><text:span text:style-name="T261">frais</text:span></text:p>
      <text:p text:style-name="P185"><text:span text:style-name="T32"/></text:p>
      <text:p text:style-name="P184"/>
      <text:p text:style-name="P186"><text:span text:style-name="T126">État du </text:span><text:span text:style-name="T262">bilan de </text:span><text:span text:style-name="T126">patrimoine</text:span> : soldes de tous les comptes internes,<text:span text:style-name="T248"> </text:span><text:span text:style-name="T249">détaill</text:span><text:span text:style-name="T250">é</text:span><text:span text:style-name="T249">s</text:span><text:span text:style-name="T248"> par type de fonctionnement </text:span><text:span text:style-name="T251">et par</text:span><text:span text:style-name="T248"> compte.</text:span></text:p>
      <text:p text:style-name="P187"/>
      <text:p text:style-name="P187"><text:span text:style-name="T224">O</text:span><text:span text:style-name="T225">n</text:span><text:span text:style-name="T224"> peut limiter à une </text:span>liste de <text:span text:style-name="T252">types de fonctionnement</text:span> <text:span text:style-name="T226">indiqués. </text:span><text:span text:style-name="T227">Pas de </text:span><text:span text:style-name="T253">type</text:span><text:span text:style-name="T254">s</text:span><text:span text:style-name="T253"> de fonctionnement indiqué</text:span><text:span text:style-name="T254">s</text:span><text:span text:style-name="T253"> </text:span><text:span text:style-name="T227"><text:s/>=&gt; tou</text:span><text:span text:style-name="T255">s les types de fonctionnement</text:span></text:p>
      <text:p text:style-name="P187"><text:span text:style-name="T228">On peut limiter à</text:span><text:span text:style-name="T229"> </text:span><text:span text:style-name="T230">une liste de </text:span><text:span text:style-name="T256">comptes</text:span><text:span text:style-name="T230"> </text:span><text:span text:style-name="T227">indiqué</text:span><text:span text:style-name="T256">s</text:span>. <text:span text:style-name="T227">Pas de </text:span><text:span text:style-name="T256">comptes</text:span><text:span text:style-name="T227"> indiqués =&gt; tous les </text:span><text:span text:style-name="T254">comptes</text:span><text:span text:style-name="T227"> des </text:span><text:span text:style-name="T257">types de fonctionnement indiqués</text:span><text:span text:style-name="T227">.</text:span></text:p>
      <text:p text:style-name="P188"><text:span text:style-name="T229">On </text:span><text:span text:style-name="T231">aussi</text:span><text:span text:style-name="T229"> </text:span><text:span text:style-name="T232">filtrer </text:span><text:span text:style-name="T233">les </text:span><text:span text:style-name="T258">comptes</text:span><text:span text:style-name="T233"> </text:span><text:span text:style-name="T232">par </text:span><text:span text:style-name="T259">titulaire </text:span><text:span text:style-name="T260">du compte</text:span><text:span text:style-name="T232">.</text:span></text:p>
      <text:p text:style-name="P189"/>
      <text:p text:style-name="P190">On doit définir le format de l’état produit en indiquant :</text:p>
      <text:list xml:id="list102833112022148" text:continue-numbering="true" text:style-name="L7">
        <text:list-item>
          <text:p text:style-name="P191">une date de <text:span text:style-name="T235">début de l’état </text:span><text:span text:style-name="T236">(obligatoire)</text:span><text:span text:style-name="T235">,</text:span></text:p>
        </text:list-item>
        <text:list-item>
          <text:p text:style-name="P192">une date de fin de l’état (<text:span text:style-name="T237">f</text:span>acultative<text:span text:style-name="T237">). </text:span><text:span text:style-name="T238">S</text:span>i cette date n’est pas mentionnée, <text:span text:style-name="T237">la date du jour sera utilisée.</text:span></text:p>
        </text:list-item>
        <text:list-item>
          <text:p text:style-name="P192"><text:span text:style-name="T237">un type de </text:span><text:span text:style-name="T239">période (facultatif) : si la période n’est pas indiquée, </text:span><text:span text:style-name="T240">l’état comportera une seule colonne comportant les informations rech</text:span><text:span text:style-name="T241">e</text:span><text:span text:style-name="T240">rchées valables entre la date de début indiquée et la date de fin indiquée. </text:span><text:span text:style-name="T242">Si la période est indiquée, l’état contiendra plusieurs colonnes, </text:span><text:span text:style-name="T243">dont les dates de début et de fin seront « recadrées » en </text:span><text:span text:style-name="T244">fonction du type de période indiqué.</text:span></text:p>
        </text:list-item>
      </text:list>
      <text:p text:style-name="P184"/>
      <text:p text:style-name="P165"><text:span text:style-name="T201">Rapport</text:span><text:span text:style-name="T12">Controller</text:span></text:p>
      <text:p text:style-name="P166"><text:span text:style-name="T32">GET<text:tab/><text:tab/>/monatis/</text:span><text:span text:style-name="T202">rapport</text:span><text:span text:style-name="T203">s</text:span><text:span text:style-name="T32">/</text:span><text:span text:style-name="T263">bilan_patrimoine</text:span></text:p>
      <text:p text:style-name="P193"/>
      <text:p text:style-name="P184"/>
      <text:p text:style-name="Heading_20_1"/>
      <text:p text:style-name="P194">Prévu<text:span text:style-name="T264">s</text:span> dans une version ultérieure</text:p>
      <text:p text:style-name="Text_20_body"/>
      <text:h text:style-name="P2" text:outline-level="3">Navigation</text:h>
      <text:list text:style-name="L8">
        <text:list-item>
          <text:p text:style-name="P195">Ah oui, et en faisant le front, je me suis dit qu'il faudrait plus tard (dans la v 2 3 ou 4 ou 5), rajouter dans le back les préférences/fréquenceClique. En gros, ça permettrait d' organiser intelligemment les éléments des listes dans l'ordre du plus au moins utilisé par l'utilisateur. (Confort pour l'utilisateur)</text:p>
        </text:list-item>
      </text:list>
      <text:h text:style-name="P2" text:outline-level="3">Administration</text:h>
      <text:list text:style-name="L9">
        <text:list-item>
          <text:p text:style-name="P196">Export<text:span text:style-name="T265">s </text:span>et <text:span text:style-name="T265">i</text:span>mports CSV pour des sauvegardes à la demande</text:p>
        </text:list-item>
        <text:list-item>
          <text:p text:style-name="P197"><text:span text:style-name="T266">Réfléchir à la façon de procéder quand un changement de version implique la modification d’une table existante </text:span><text:span text:style-name="T267">(migration des données) </text:span><text:span text:style-name="T268">avec h2 database</text:span></text:p>
        </text:list-item>
        <text:list-item>
          <text:p text:style-name="P198">Historisation/<text:span text:style-name="T269">archiva</text:span><text:span text:style-name="T270">ge</text:span> pour allègement du volume des données.</text:p>
        </text:list-item>
        <text:list-item>
          <text:p text:style-name="P199">Import CSV pour <text:span text:style-name="T271">d</text:span>es relevés d’opérations téléchargés depuis une banque</text:p>
        </text:list-item>
      </text:list>
      <text:h text:style-name="P200" text:outline-level="3">Données</text:h>
      <text:list text:style-name="L10">
        <text:list-item>
          <text:p text:style-name="P201">Modification des opérations.<text:span text:style-name="T272"> </text:span><text:span text:style-name="T273">Possibilité d’ajouter des lignes de détail.</text:span></text:p>
        </text:list-item>
        <text:list-item>
          <text:p text:style-name="P202">Ajout de la possibilité de conserver la trace des <text:span text:style-name="T126">plus ou moins values </text:span><text:span text:style-name="T274">réalisées</text:span> lors de la <text:span text:style-name="T275">cession </text:span>d’éléments du patrimoine du foyer.</text:p>
        </text:list-item>
        <text:list-item>
          <text:p text:style-name="P203">Définition de critères <text:s/>pour <text:span text:style-name="T126">définir un ensemble d’opérations</text:span> <text:span text:style-name="T276">(la sous-catégorie, le bénéficiaire, </text:span><text:span text:style-name="T277">le compte impliqué en dépense, le compte impliqué en recette, </text:span><text:span text:style-name="T278">un intervalle de dates</text:span><text:span text:style-name="T276">, </text:span><text:span text:style-name="T279">le type d’opération…, <text:s/></text:span><text:span text:style-name="T280">tout ça combinable</text:span><text:span text:style-name="T281">)</text:span><text:span text:style-name="T276"> </text:span><text:s/></text:p>
        </text:list-item>
        <text:list-item>
          <text:p text:style-name="P203">Ajout de la possibilité d’<text:span text:style-name="T126">appliquer </text:span><text:span text:style-name="T282">une </text:span><text:span text:style-name="T283">même</text:span><text:span text:style-name="T126"> modification </text:span><text:span text:style-name="T284">à</text:span><text:span text:style-name="T126"> un ensemble d’opérations.</text:span></text:p>
        </text:list-item>
        <text:list-item>
          <text:p text:style-name="P204">Les <text:span text:style-name="T126">budgets</text:span> : saisie par catégorie et/ou par sous-catégorie et/ou par bénéficiaire et intégration du statut d’avancement dans l’état des dépenses et des rec<text:span text:style-name="T285">e</text:span>ttes. <text:span text:style-name="T286">A terminer.</text:span></text:p>
        </text:list-item>
        <text:list-item>
          <text:p text:style-name="P205">Fiabilisation des <text:span text:style-name="T126">évaluations</text:span> en prenant en compte les dates de solde initial <text:span text:style-name="T287">et de clôture des comptes </text:span><text:span text:style-name="T288">internes</text:span><text:span text:style-name="T287"> auxquels elles sont associé</text:span><text:span text:style-name="T289">e</text:span><text:span text:style-name="T287">s.</text:span></text:p>
        </text:list-item>
        <text:list-item>
          <text:p text:style-name="P206"><text:span text:style-name="T126">Opérations récurrentes</text:span> pré-programmées</text:p>
        </text:list-item>
        <text:list-item>
          <text:p text:style-name="P207">Calcul d’ <text:span text:style-name="T126">échéancier</text:span><text:span text:style-name="T290">s</text:span><text:span text:style-name="T126"> de remboursement d’emprunt</text:span></text:p>
        </text:list-item>
        <text:list-item>
          <text:p text:style-name="P208">Pointage des opérations</text:p>
        </text:list-item>
        <text:list-item>
          <text:p text:style-name="P209">Définir des appliquer la création d’opérations complexes <text:span text:style-name="T291">(constituées de plusieurs opérations de base) comme par exemple l’enregistrement d’une échéance d’emprunt ou divers frais pélevés automatiquement sur des transactions diverses</text:span></text:p>
        </text:list-item>
      </text:list>
      <text:h text:style-name="P210" text:outline-level="3"><text:soft-page-break/>Rapports</text:h>
      <text:p text:style-name="P211"><text:span text:style-name="T292">Possibilité de g</text:span>énérer tous les rapports au<text:span text:style-name="T293">x</text:span> format<text:span text:style-name="T293">s</text:span> PDF <text:span text:style-name="T293">et CSV</text:span></text:p>
      <text:p text:style-name="Heading_20_3"><text:span text:style-name="T294">Créer de n</text:span>ouveaux <text:span text:style-name="T295">rapports</text:span></text:p>
      <text:p text:style-name="P212"><text:span text:style-name="T296">État des plus et moins values</text:span><text:span text:style-name="T297"> : </text:span><text:span text:style-name="T298">montants des </text:span><text:span text:style-name="T297">plus ou moins values potentielles </text:span><text:span text:style-name="T299">et réalisées</text:span><text:span text:style-name="T297"> </text:span><text:span text:style-name="T300">de tous les comptes internes,</text:span><text:span text:style-name="T248"> </text:span><text:span text:style-name="T249">détaill</text:span><text:span text:style-name="T250">é</text:span><text:span text:style-name="T249">s</text:span><text:span text:style-name="T248"> par type de fonctionnement </text:span><text:span text:style-name="T251">et par</text:span><text:span text:style-name="T248"> compte.</text:span></text:p>
      <text:p text:style-name="P213"><text:span text:style-name="T224">O</text:span><text:span text:style-name="T225">n</text:span><text:span text:style-name="T224"> peut limiter à une </text:span>liste de <text:span text:style-name="T252">types de fonctionnement</text:span> <text:span text:style-name="T226">indiqués. </text:span><text:span text:style-name="T227">Pas de </text:span><text:span text:style-name="T253">type</text:span><text:span text:style-name="T254">s</text:span><text:span text:style-name="T253"> de fonctionnement indiqué</text:span><text:span text:style-name="T254">s</text:span><text:span text:style-name="T253"> </text:span><text:span text:style-name="T227"><text:s/>=&gt; tou</text:span><text:span text:style-name="T255">s les types de fonctionnement</text:span></text:p>
      <text:p text:style-name="P213"><text:span text:style-name="T228">On peut limiter à</text:span><text:span text:style-name="T229"> </text:span><text:span text:style-name="T230">une liste de </text:span><text:span text:style-name="T256">comptes</text:span><text:span text:style-name="T230"> </text:span><text:span text:style-name="T227">indiqué</text:span><text:span text:style-name="T256">s</text:span>. <text:span text:style-name="T227">Pas de </text:span><text:span text:style-name="T256">comptes</text:span><text:span text:style-name="T227"> indiqués =&gt; tous les </text:span><text:span text:style-name="T254">comptes</text:span><text:span text:style-name="T227"> des </text:span><text:span text:style-name="T257">types de fonctionnement indiqués</text:span><text:span text:style-name="T227">.</text:span></text:p>
      <text:p text:style-name="P213"><text:span text:style-name="T229">On </text:span><text:span text:style-name="T231">aussi</text:span><text:span text:style-name="T229"> </text:span><text:span text:style-name="T232">filtrer </text:span><text:span text:style-name="T233">les </text:span><text:span text:style-name="T258">comptes</text:span><text:span text:style-name="T233"> </text:span><text:span text:style-name="T232">par </text:span><text:span text:style-name="T259">titulaire </text:span><text:span text:style-name="T260">du compte</text:span><text:span text:style-name="T232">.</text:span></text:p>
      <text:p text:style-name="P214"/>
      <text:p text:style-name="P215">On doit définir le format de l’état produit en indiquant :</text:p>
      <text:list text:continue-list="list102833112022148" text:style-name="L7">
        <text:list-item>
          <text:p text:style-name="P216">une date de <text:span text:style-name="T235">début de l’état </text:span><text:span text:style-name="T236">(obligatoire)</text:span><text:span text:style-name="T235">,</text:span></text:p>
        </text:list-item>
        <text:list-item>
          <text:p text:style-name="P217">une date de fin de l’état (<text:span text:style-name="T237">f</text:span>acultative<text:span text:style-name="T237">). </text:span><text:span text:style-name="T238">S</text:span>i cette date n’est pas mentionnée, <text:span text:style-name="T237">la date du jour sera utilisée.</text:span></text:p>
        </text:list-item>
        <text:list-item>
          <text:p text:style-name="P217"><text:span text:style-name="T237">un type de </text:span><text:span text:style-name="T239">période (facultatif) : si la période n’est pas indiquée, </text:span><text:span text:style-name="T240">l’état comportera une seule colonne comportant les informations rech</text:span><text:span text:style-name="T241">e</text:span><text:span text:style-name="T240">rchées valables entre la date de début indiquée et la date de fin indiquée. </text:span><text:span text:style-name="T242">Si la période est indiquée, l’état contiendra plusieurs colonnes, </text:span><text:span text:style-name="T243">dont les dates de début et de fin seront « recadrées » en </text:span><text:span text:style-name="T244">fonction du type de période indiqué.</text:span></text:p>
        </text:list-item>
      </text:list>
      <text:p text:style-name="P218"/>
      <text:p text:style-name="P219"><text:span text:style-name="T126">Relevé des opérations non catégori</text:span><text:span text:style-name="T301">s</text:span><text:span text:style-name="T126">ées</text:span> : <text:span text:style-name="T198">toutes les opérations </text:span><text:span text:style-name="T302">de dépense ou recette </text:span>sans<text:span text:style-name="T303"> sous-catégorie</text:span><text:span text:style-name="T199"> </text:span><text:span text:style-name="T198">entre les dates de début et de fin indiqué</text:span><text:span text:style-name="T199">es </text:span><text:span text:style-name="T200">(incluses)</text:span><text:span text:style-name="T198">.</text:span></text:p>
      <text:p text:style-name="P218"/>
      <text:p text:style-name="P220"><text:span text:style-name="T126">Relevé </text:span><text:span text:style-name="T304">des opérations par</text:span><text:span text:style-name="T126"> </text:span><text:span text:style-name="T305">cat</text:span><text:span text:style-name="T306">é</text:span><text:span text:style-name="T305">gorie</text:span><text:span text:style-name="T307"> </text:span><text:span text:style-name="T308">: </text:span><text:span text:style-name="T309">toutes les opérations </text:span><text:span text:style-name="T310">de dépense ou recette </text:span><text:span text:style-name="T309">effectuées sur l</text:span><text:span text:style-name="T311">a catégorie</text:span><text:span text:style-name="T309"> </text:span><text:span text:style-name="T312">indiqué</text:span><text:span text:style-name="T311">e</text:span><text:span text:style-name="T312"> </text:span><text:span text:style-name="T309">entre les dates de début et de fin indiqué</text:span><text:span text:style-name="T312">es </text:span><text:span text:style-name="T313">(incluses)</text:span><text:span text:style-name="T309">. </text:span></text:p>
      <text:p text:style-name="P221"><text:span text:style-name="T126">Relevé de</text:span><text:span text:style-name="T314">s opérations par</text:span><text:span text:style-name="T126"> </text:span><text:span text:style-name="T305">sous-cat</text:span><text:span text:style-name="T306">é</text:span><text:span text:style-name="T305">gorie</text:span><text:span text:style-name="T197"> : </text:span><text:span text:style-name="T198">toutes les opérations effectuées sur l</text:span><text:span text:style-name="T303">a sous-catégorie</text:span><text:span text:style-name="T198"> </text:span><text:span text:style-name="T199">indiqué</text:span><text:span text:style-name="T303">e</text:span><text:span text:style-name="T199"> </text:span><text:span text:style-name="T198">entre les dates de début et de fin indiqué</text:span><text:span text:style-name="T199">es </text:span><text:span text:style-name="T200">(incluses)</text:span><text:span text:style-name="T198">.</text:span></text:p>
      <text:p text:style-name="P222"><text:span text:style-name="T126">Relevé des opérations par bénéficiaire</text:span> : <text:span text:style-name="T198">toutes les opérations effectuées sur l</text:span>e bénéficiair<text:span text:style-name="T303">e</text:span><text:span text:style-name="T198"> </text:span><text:span text:style-name="T199">indiqué </text:span><text:span text:style-name="T198">entre les dates de début et de fin indiqué</text:span><text:span text:style-name="T199">es </text:span><text:span text:style-name="T200">(incluses)</text:span><text:span text:style-name="T198">.</text:span></text:p>
      <text:p text:style-name="P223"><text:span text:style-name="T126">Relevé des opérations de frais et rémunérations par compte interne</text:span> : <text:span text:style-name="T197"><text:s/></text:span><text:span text:style-name="T198">toutes les opérations </text:span>de rémunérations et frais<text:span text:style-name="T198"> effectuées sur le compte </text:span><text:span text:style-name="T315">interne </text:span><text:span text:style-name="T199">indiqué </text:span><text:span text:style-name="T198">entre les dates de début et de fin indiqué</text:span><text:span text:style-name="T199">es </text:span><text:span text:style-name="T200">(incluses)</text:span><text:span text:style-name="T198">.</text:span></text:p>
      <text:p text:style-name="P223">Il s’agit <text:span text:style-name="T316">d’</text:span>un extrait du relevé des opérations par compte, <text:s/>limité aux seules opérations de <text:span text:style-name="T315">rémunérati</text:span><text:span text:style-name="T317">o</text:span><text:span text:style-name="T318">n</text:span><text:span text:style-name="T315">s et </text:span><text:span text:style-name="T317">de </text:span>frais</text:p>
      <text:p text:style-name="P224"><text:span text:style-name="T126">Relevé des opérations de plus ou moins values réalisées par compte interne</text:span> : <text:span text:style-name="T319">chaque </text:span><text:span text:style-name="T320">plus ou moins values réalisée sur </text:span>les opérations de cessions <text:span text:style-name="T321">du</text:span><text:span text:style-name="T198"> compte </text:span><text:span text:style-name="T315">interne </text:span><text:span text:style-name="T199">indiqué </text:span><text:span text:style-name="T198">entre les dates de début et de fin indiqué</text:span><text:span text:style-name="T199">es </text:span><text:span text:style-name="T200">(incluses)</text:span><text:span text:style-name="T198">.</text:span></text:p>
      <text:p text:style-name="P225">Relevé des opérations non pointées</text:p>
      <text:p text:style-name="Standard"/>
      <text:p text:style-name="Standard"/>
      <text:h text:style-name="P2" text:outline-level="3"><text:soft-page-break/>Divers</text:h>
      <text:list text:style-name="L11">
        <text:list-item>
          <text:p text:style-name="P226">Définir un logo pour l’application.</text:p>
        </text:list-item>
        <text:list-item>
          <text:p text:style-name="P226">Trouver un meilleur nom que « MONATIS »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3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Bullet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1T12:12:58.086917800</meta:creation-date>
    <dc:date>2026-03-24T10:28:31.522318200</dc:date>
    <meta:editing-duration>P3DT7H33M27S</meta:editing-duration>
    <meta:editing-cycles>718</meta:editing-cycles>
    <meta:generator>LibreOffice/26.2.1.2$Windows_X86_64 LibreOffice_project/620$Build-2</meta:generator>
    <meta:print-date>2026-03-20T15:43:32.624741200</meta:print-date>
    <meta:document-statistic meta:table-count="0" meta:image-count="0" meta:object-count="0" meta:page-count="13" meta:paragraph-count="278" meta:word-count="2642" meta:character-count="19070" meta:non-whitespace-character-count="16663"/>
  </office:meta>
</office:document-meta>
</file>